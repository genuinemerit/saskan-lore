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809in"/>
    </style:style>
    <style:style style:name="Table1.B" style:family="table-column">
      <style:table-column-properties style:column-width="0.6993in"/>
    </style:style>
    <style:style style:name="Table1.C" style:family="table-column">
      <style:table-column-properties style:column-width="1.1882in"/>
    </style:style>
    <style:style style:name="Table1.D" style:family="table-column">
      <style:table-column-properties style:column-width="0.7646in"/>
    </style:style>
    <style:style style:name="Table1.E" style:family="table-column">
      <style:table-column-properties style:column-width="0.6653in"/>
    </style:style>
    <style:style style:name="Table1.F" style:family="table-column">
      <style:table-column-properties style:column-width="1.166in"/>
    </style:style>
    <style:style style:name="Table1.G" style:family="table-column">
      <style:table-column-properties style:column-width="1.4007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Quotations" style:list-style-name="L164"/>
    <style:style style:name="P3" style:family="paragraph" style:parent-style-name="Table_20_Contents">
      <style:paragraph-properties fo:text-align="end"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Heading">
      <style:paragraph-properties fo:text-align="end"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4"/>
    <style:style style:name="P60" style:family="paragraph" style:parent-style-name="Text_20_body" style:list-style-name="L55"/>
    <style:style style:name="P61" style:family="paragraph" style:parent-style-name="Text_20_body" style:list-style-name="L56"/>
    <style:style style:name="P62" style:family="paragraph" style:parent-style-name="Text_20_body" style:list-style-name="L57"/>
    <style:style style:name="P63" style:family="paragraph" style:parent-style-name="Text_20_body" style:list-style-name="L58"/>
    <style:style style:name="P64" style:family="paragraph" style:parent-style-name="Text_20_body"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ent-style-name="Text_20_body" style:list-style-name="L63"/>
    <style:style style:name="P69" style:family="paragraph" style:parent-style-name="Text_20_body" style:list-style-name="L64"/>
    <style:style style:name="P70" style:family="paragraph" style:parent-style-name="Text_20_body" style:list-style-name="L65"/>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Text_20_body" style:list-style-name="L80"/>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4"/>
    <style:style style:name="P90" style:family="paragraph" style:parent-style-name="Text_20_body" style:list-style-name="L85"/>
    <style:style style:name="P91" style:family="paragraph" style:parent-style-name="Text_20_body" style:list-style-name="L86"/>
    <style:style style:name="P92" style:family="paragraph" style:parent-style-name="Text_20_body" style:list-style-name="L87"/>
    <style:style style:name="P93" style:family="paragraph" style:parent-style-name="Text_20_body" style:list-style-name="L88"/>
    <style:style style:name="P94" style:family="paragraph" style:parent-style-name="Text_20_body" style:list-style-name="L89"/>
    <style:style style:name="P95" style:family="paragraph" style:parent-style-name="Text_20_body" style:list-style-name="L90"/>
    <style:style style:name="P96" style:family="paragraph" style:parent-style-name="Text_20_body" style:list-style-name="L91"/>
    <style:style style:name="P97" style:family="paragraph" style:parent-style-name="Text_20_body" style:list-style-name="L92"/>
    <style:style style:name="P98" style:family="paragraph" style:parent-style-name="Text_20_body" style:list-style-name="L93"/>
    <style:style style:name="P99" style:family="paragraph" style:parent-style-name="Text_20_body" style:list-style-name="L94"/>
    <style:style style:name="P100" style:family="paragraph" style:parent-style-name="Text_20_body" style:list-style-name="L95"/>
    <style:style style:name="P101" style:family="paragraph" style:parent-style-name="Text_20_body" style:list-style-name="L96"/>
    <style:style style:name="P102" style:family="paragraph" style:parent-style-name="Text_20_body" style:list-style-name="L97"/>
    <style:style style:name="P103" style:family="paragraph" style:parent-style-name="Text_20_body" style:list-style-name="L98"/>
    <style:style style:name="P104" style:family="paragraph" style:parent-style-name="Text_20_body" style:list-style-name="L99"/>
    <style:style style:name="P105" style:family="paragraph" style:parent-style-name="Text_20_body" style:list-style-name="L100"/>
    <style:style style:name="P106" style:family="paragraph" style:parent-style-name="Text_20_body" style:list-style-name="L101"/>
    <style:style style:name="P107" style:family="paragraph" style:parent-style-name="Text_20_body" style:list-style-name="L102"/>
    <style:style style:name="P108" style:family="paragraph" style:parent-style-name="Text_20_body" style:list-style-name="L103"/>
    <style:style style:name="P109" style:family="paragraph" style:parent-style-name="Text_20_body" style:list-style-name="L104"/>
    <style:style style:name="P110" style:family="paragraph" style:parent-style-name="Text_20_body" style:list-style-name="L105"/>
    <style:style style:name="P111" style:family="paragraph" style:parent-style-name="Text_20_body" style:list-style-name="L106"/>
    <style:style style:name="P112" style:family="paragraph" style:parent-style-name="Text_20_body" style:list-style-name="L107"/>
    <style:style style:name="P113" style:family="paragraph" style:parent-style-name="Text_20_body" style:list-style-name="L108"/>
    <style:style style:name="P114" style:family="paragraph" style:parent-style-name="Text_20_body" style:list-style-name="L109"/>
    <style:style style:name="P115" style:family="paragraph" style:parent-style-name="Text_20_body" style:list-style-name="L110"/>
    <style:style style:name="P116" style:family="paragraph" style:parent-style-name="Text_20_body" style:list-style-name="L111"/>
    <style:style style:name="P117" style:family="paragraph" style:parent-style-name="Text_20_body" style:list-style-name="L112"/>
    <style:style style:name="P118" style:family="paragraph" style:parent-style-name="Text_20_body" style:list-style-name="L113"/>
    <style:style style:name="P119" style:family="paragraph" style:parent-style-name="Text_20_body" style:list-style-name="L114"/>
    <style:style style:name="P120" style:family="paragraph" style:parent-style-name="Text_20_body" style:list-style-name="L115"/>
    <style:style style:name="P121" style:family="paragraph" style:parent-style-name="Text_20_body" style:list-style-name="L116"/>
    <style:style style:name="P122" style:family="paragraph" style:parent-style-name="Text_20_body" style:list-style-name="L117"/>
    <style:style style:name="P123" style:family="paragraph" style:parent-style-name="Text_20_body" style:list-style-name="L118"/>
    <style:style style:name="P124" style:family="paragraph" style:parent-style-name="Text_20_body" style:list-style-name="L119"/>
    <style:style style:name="P125" style:family="paragraph" style:parent-style-name="Text_20_body" style:list-style-name="L120"/>
    <style:style style:name="P126" style:family="paragraph" style:parent-style-name="Text_20_body" style:list-style-name="L121"/>
    <style:style style:name="P127" style:family="paragraph" style:parent-style-name="Text_20_body" style:list-style-name="L122"/>
    <style:style style:name="P128" style:family="paragraph" style:parent-style-name="Text_20_body" style:list-style-name="L123"/>
    <style:style style:name="P129" style:family="paragraph" style:parent-style-name="Text_20_body" style:list-style-name="L124"/>
    <style:style style:name="P130" style:family="paragraph" style:parent-style-name="Text_20_body" style:list-style-name="L125"/>
    <style:style style:name="P131" style:family="paragraph" style:parent-style-name="Text_20_body" style:list-style-name="L126"/>
    <style:style style:name="P132" style:family="paragraph" style:parent-style-name="Text_20_body" style:list-style-name="L127"/>
    <style:style style:name="P133" style:family="paragraph" style:parent-style-name="Text_20_body" style:list-style-name="L128"/>
    <style:style style:name="P134" style:family="paragraph" style:parent-style-name="Text_20_body" style:list-style-name="L129"/>
    <style:style style:name="P135" style:family="paragraph" style:parent-style-name="Text_20_body" style:list-style-name="L130"/>
    <style:style style:name="P136" style:family="paragraph" style:parent-style-name="Text_20_body" style:list-style-name="L131"/>
    <style:style style:name="P137" style:family="paragraph" style:parent-style-name="Text_20_body" style:list-style-name="L132"/>
    <style:style style:name="P138" style:family="paragraph" style:parent-style-name="Text_20_body" style:list-style-name="L133"/>
    <style:style style:name="P139" style:family="paragraph" style:parent-style-name="Text_20_body" style:list-style-name="L134"/>
    <style:style style:name="P140" style:family="paragraph" style:parent-style-name="Text_20_body" style:list-style-name="L135"/>
    <style:style style:name="P141" style:family="paragraph" style:parent-style-name="Text_20_body" style:list-style-name="L136"/>
    <style:style style:name="P142" style:family="paragraph" style:parent-style-name="Text_20_body" style:list-style-name="L137"/>
    <style:style style:name="P143" style:family="paragraph" style:parent-style-name="Text_20_body" style:list-style-name="L138"/>
    <style:style style:name="P144" style:family="paragraph" style:parent-style-name="Text_20_body" style:list-style-name="L139"/>
    <style:style style:name="P145" style:family="paragraph" style:parent-style-name="Text_20_body" style:list-style-name="L140"/>
    <style:style style:name="P146" style:family="paragraph" style:parent-style-name="Text_20_body" style:list-style-name="L141"/>
    <style:style style:name="P147" style:family="paragraph" style:parent-style-name="Text_20_body" style:list-style-name="L142"/>
    <style:style style:name="P148" style:family="paragraph" style:parent-style-name="Text_20_body" style:list-style-name="L143"/>
    <style:style style:name="P149" style:family="paragraph" style:parent-style-name="Text_20_body" style:list-style-name="L144"/>
    <style:style style:name="P150" style:family="paragraph" style:parent-style-name="Text_20_body" style:list-style-name="L145"/>
    <style:style style:name="P151" style:family="paragraph" style:parent-style-name="Text_20_body" style:list-style-name="L146"/>
    <style:style style:name="P152" style:family="paragraph" style:parent-style-name="Text_20_body" style:list-style-name="L147"/>
    <style:style style:name="P153" style:family="paragraph" style:parent-style-name="Text_20_body" style:list-style-name="L148"/>
    <style:style style:name="P154" style:family="paragraph" style:parent-style-name="Text_20_body" style:list-style-name="L149"/>
    <style:style style:name="P155" style:family="paragraph" style:parent-style-name="Text_20_body" style:list-style-name="L150"/>
    <style:style style:name="P156" style:family="paragraph" style:parent-style-name="Text_20_body" style:list-style-name="L151"/>
    <style:style style:name="P157" style:family="paragraph" style:parent-style-name="Text_20_body" style:list-style-name="L152"/>
    <style:style style:name="P158" style:family="paragraph" style:parent-style-name="Text_20_body" style:list-style-name="L153"/>
    <style:style style:name="P159" style:family="paragraph" style:parent-style-name="Text_20_body" style:list-style-name="L154"/>
    <style:style style:name="P160" style:family="paragraph" style:parent-style-name="Text_20_body" style:list-style-name="L155"/>
    <style:style style:name="P161" style:family="paragraph" style:parent-style-name="Text_20_body" style:list-style-name="L156"/>
    <style:style style:name="P162" style:family="paragraph" style:parent-style-name="Text_20_body" style:list-style-name="L157"/>
    <style:style style:name="P163" style:family="paragraph" style:parent-style-name="Text_20_body" style:list-style-name="L158"/>
    <style:style style:name="P164" style:family="paragraph" style:parent-style-name="Text_20_body" style:list-style-name="L159"/>
    <style:style style:name="P165" style:family="paragraph" style:parent-style-name="Text_20_body" style:list-style-name="L160"/>
    <style:style style:name="P166" style:family="paragraph" style:parent-style-name="Text_20_body" style:list-style-name="L161"/>
    <style:style style:name="P167" style:family="paragraph" style:parent-style-name="Text_20_body" style:list-style-name="L162"/>
    <style:style style:name="P168" style:family="paragraph" style:parent-style-name="Text_20_body" style:list-style-name="L163"/>
    <style:style style:name="P169" style:family="paragraph" style:parent-style-name="Text_20_body" style:list-style-name="L165"/>
    <style:style style:name="P170" style:family="paragraph" style:parent-style-name="Text_20_body" style:list-style-name="L166"/>
    <style:style style:name="P171" style:family="paragraph" style:parent-style-name="Text_20_body" style:list-style-name="L167"/>
    <style:style style:name="P172" style:family="paragraph" style:parent-style-name="Text_20_body" style:list-style-name="L168"/>
    <style:style style:name="P173" style:family="paragraph" style:parent-style-name="Text_20_body" style:list-style-name="L169"/>
    <style:style style:name="P174" style:family="paragraph" style:parent-style-name="Text_20_body" style:list-style-name="L170"/>
    <style:style style:name="P175" style:family="paragraph" style:parent-style-name="Text_20_body" style:list-style-name="L171"/>
    <style:style style:name="P176" style:family="paragraph" style:parent-style-name="Text_20_body" style:list-style-name="L172"/>
    <style:style style:name="P177" style:family="paragraph" style:parent-style-name="Text_20_body" style:list-style-name="L173"/>
    <style:style style:name="P178" style:family="paragraph" style:parent-style-name="Text_20_body" style:list-style-name="L174"/>
    <style:style style:name="P179" style:family="paragraph" style:parent-style-name="Text_20_body" style:list-style-name="L175"/>
    <style:style style:name="P180" style:family="paragraph" style:parent-style-name="Text_20_body" style:list-style-name="L176"/>
    <style:style style:name="P181" style:family="paragraph" style:parent-style-name="Text_20_body" style:list-style-name="L177"/>
    <style:style style:name="P182" style:family="paragraph" style:parent-style-name="Text_20_body" style:list-style-name="L178"/>
    <style:style style:name="P183" style:family="paragraph" style:parent-style-name="Text_20_body" style:list-style-name="L179"/>
    <style:style style:name="P184" style:family="paragraph" style:parent-style-name="Text_20_body" style:list-style-name="L180"/>
    <style:style style:name="P185" style:family="paragraph" style:parent-style-name="Text_20_body" style:list-style-name="L181"/>
    <style:style style:name="P186" style:family="paragraph" style:parent-style-name="Text_20_body" style:list-style-name="L182"/>
    <style:style style:name="P187" style:family="paragraph" style:parent-style-name="Text_20_body" style:list-style-name="L183"/>
    <style:style style:name="P188" style:family="paragraph" style:parent-style-name="Text_20_body" style:list-style-name="L184"/>
    <style:style style:name="P189" style:family="paragraph" style:parent-style-name="Text_20_body" style:list-style-name="L185"/>
    <style:style style:name="P190" style:family="paragraph" style:parent-style-name="Text_20_body" style:list-style-name="L186"/>
    <style:style style:name="P191" style:family="paragraph" style:parent-style-name="Text_20_body" style:list-style-name="L187"/>
    <style:style style:name="P192" style:family="paragraph" style:parent-style-name="Text_20_body" style:list-style-name="L188"/>
    <style:style style:name="P193" style:family="paragraph" style:parent-style-name="Text_20_body" style:list-style-name="L189"/>
    <style:style style:name="P194" style:family="paragraph" style:parent-style-name="Text_20_body" style:list-style-name="L190"/>
    <style:style style:name="P195" style:family="paragraph" style:parent-style-name="Text_20_body" style:list-style-name="L191"/>
    <style:style style:name="P196" style:family="paragraph" style:parent-style-name="Text_20_body" style:list-style-name="L192"/>
    <style:style style:name="P197" style:family="paragraph" style:parent-style-name="Text_20_body" style:list-style-name="L193"/>
    <style:style style:name="P198" style:family="paragraph" style:parent-style-name="Text_20_body" style:list-style-name="L194"/>
    <style:style style:name="P199" style:family="paragraph" style:parent-style-name="Text_20_body" style:list-style-name="L195"/>
    <style:style style:name="P200" style:family="paragraph" style:parent-style-name="Text_20_body" style:list-style-name="L196"/>
    <style:style style:name="P201" style:family="paragraph" style:parent-style-name="Text_20_body" style:list-style-name="L197"/>
    <style:style style:name="T1" style:family="text">
      <style:text-properties officeooo:rsid="0002b6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would like to work on, one is experimenting with creating my own (small) LLM <text:span text:style-name="T1">or (not sure that is the right terminology) smart tool</text:span> and training it on the lore from the fantasy/sci-fi world I have been building. I think the MacOS (M2) has enough bandwidth to handle it, at least on a small scale. Not sure about the Linux laptop. </text:p>
      <text:p text:style-name="Standard"/>
      <text:p text:style-name="Standard">I have explored previously a little bit some of the relevant topics. I am pretty good with python and SQL, can manage C/C++ if I need to, and am interested in learning Rust, and I have a fundamental understanding of big data, linear algebra, statistics and so on, though I am certainly not an expert data scientist in the modern sense <text:span text:style-name="T1">and need help with terminology, newer technologies</text:span>. This would be a hobby project, not something with any commercial or even public/open intensions, at least not initially. </text:p>
      <text:p text:style-name="Standard"/>
      <text:p text:style-name="Standard">---</text:p>
      <text:p text:style-name="Standard"/>
      <text:p text:style-name="Text_20_body">Yes. And the biggest suggestion is this:</text:p>
      <text:p text:style-name="Text_20_body"><text:span text:style-name="Strong_20_Emphasis">Do not start by “creating your own LLM” from scratch. Start by adapting a small existing model to your world.</text:span></text:p>
      <text:p text:style-name="Text_20_body">For a hobby project on an M2 Mac, that is the sane path. Apple’s MLX stack is built for Apple silicon, and MLX-LM explicitly supports running and fine-tuning LLMs on Apple silicon, including low-rank fine-tuning and quantized models. Hugging Face’s PEFT docs likewise point to LoRA as the standard low-cost way to adapt a base model without retraining all parameters. (<text:a xlink:type="simple" xlink:href="https://github.com/ml-explore/mlx?utm_source=chatgpt.com" text:style-name="Internet_20_link" text:visited-style-name="Visited_20_Internet_20_Link">GitHub</text:a>)</text:p>
      <text:p text:style-name="Text_20_body">What I would do is a staged path:</text:p>
      <text:p text:style-name="Text_20_body"><text:span text:style-name="Strong_20_Emphasis">Stage 1: Build a lore corpus before touching training.</text:span><text:line-break/>Get your world material into clean text files with stable metadata: source, character, place, era, faction, reliability, and canon level. Split it into chunks that are coherent on their own. This matters more than people think. If your corpus is muddy, your model will be muddy.</text:p>
      <text:p text:style-name="Text_20_body"><text:span text:style-name="Strong_20_Emphasis">Stage 2: Make a retrieval system first.</text:span><text:line-break/>Before fine-tuning anything, build a small RAG prototype: embeddings + vector search + a local model that answers using retrieved lore chunks. This gives you fast feedback on whether the problem is really “the model lacks knowledge” or just “the context isn’t being supplied well.” In many lore projects, a good retrieval layer gets you most of the value with far less work and risk.</text:p>
      <text:p text:style-name="Text_20_body"><text:span text:style-name="Strong_20_Emphasis">Stage 3: Then do a small LoRA fine-tune.</text:span><text:line-break/>Take a small instruct model and fine-tune it on your lore voice, terminology, naming conventions, and house style. MLX-LM supports fine-tuning on Apple silicon, and PEFT/LoRA is the obvious method for a machine in your class because it keeps memory and storage demands down. (<text:a xlink:type="simple" xlink:href="https://github.com/ml-explore/mlx-lm?utm_source=chatgpt.com" text:style-name="Internet_20_link" text:visited-style-name="Visited_20_Internet_20_Link">GitHub</text:a>)</text:p>
      <text:p text:style-name="Text_20_body">A good first target is not “make it know everything.” It is narrower:</text:p>
      <text:list text:style-name="L1">
        <text:list-item>
          <text:p text:style-name="P6">answer consistently about your setting</text:p>
        </text:list-item>
        <text:list-item>
          <text:p text:style-name="P6">use your terminology correctly</text:p>
        </text:list-item>
        <text:list-item>
          <text:p text:style-name="P6">keep tone and style aligned with your lore</text:p>
        </text:list-item>
        <text:list-item>
          <text:p text:style-name="P6">avoid hallucinating against canon</text:p>
        </text:list-item>
      </text:list>
      <text:p text:style-name="Text_20_body">That is much more achievable.</text:p>
      <text:p text:style-name="Text_20_body"><text:soft-page-break/>A practical first stack on the M2 Mac would be:</text:p>
      <text:list text:style-name="L2">
        <text:list-item>
          <text:p text:style-name="P7"><text:span text:style-name="Strong_20_Emphasis">Python</text:span> for data prep and experiments</text:p>
        </text:list-item>
        <text:list-item>
          <text:p text:style-name="P7"><text:span text:style-name="Strong_20_Emphasis">MLX / MLX-LM</text:span> for Apple-silicon-native local work (<text:a xlink:type="simple" xlink:href="https://github.com/ml-explore/mlx?utm_source=chatgpt.com" text:style-name="Internet_20_link" text:visited-style-name="Visited_20_Internet_20_Link">GitHub</text:a>)</text:p>
        </text:list-item>
        <text:list-item>
          <text:p text:style-name="P7"><text:span text:style-name="Strong_20_Emphasis">PEFT / LoRA</text:span> concepts for the adapter training approach (<text:a xlink:type="simple" xlink:href="https://huggingface.co/docs/peft/index?utm_source=chatgpt.com" text:style-name="Internet_20_link" text:visited-style-name="Visited_20_Internet_20_Link">Hugging Face</text:a>)</text:p>
        </text:list-item>
        <text:list-item>
          <text:p text:style-name="P7"><text:span text:style-name="Strong_20_Emphasis">llama.cpp or Ollama</text:span> for easy local inference and testing of finished models/adapters (<text:a xlink:type="simple" xlink:href="https://github.com/ggml-org/llama.cpp?utm_source=chatgpt.com" text:style-name="Internet_20_link" text:visited-style-name="Visited_20_Internet_20_Link">GitHub</text:a>)</text:p>
        </text:list-item>
      </text:list>
      <text:p text:style-name="Text_20_body">The Linux laptop may still be useful, but I would treat it as the secondary box for preprocessing, corpus management, evaluation scripts, SQL work, and maybe inference. The M2 Mac is the better first home for local fine-tuning because Apple’s MLX ecosystem is specifically aimed at Apple silicon. (<text:a xlink:type="simple" xlink:href="https://github.com/ml-explore/mlx?utm_source=chatgpt.com" text:style-name="Internet_20_link" text:visited-style-name="Visited_20_Internet_20_Link">GitHub</text:a>)</text:p>
      <text:p text:style-name="Text_20_body">A very reasonable sequence of small steps would be:</text:p>
      <text:list text:style-name="L3">
        <text:list-item>
          <text:p text:style-name="P8"><text:span text:style-name="Strong_20_Emphasis">Normalize the lore.</text:span><text:line-break/>Convert your notes, Scrivener exports, lore docs, and world text into one structured dataset.</text:p>
        </text:list-item>
        <text:list-item>
          <text:p text:style-name="P8"><text:span text:style-name="Strong_20_Emphasis">Create three datasets, not one.</text:span><text:line-break/>One for raw canon passages, one for Q&amp;A pairs, and one for style examples.<text:line-break/>Example Q&amp;A pair: “Who are the Fatunik?” → grounded answer from your canon.</text:p>
        </text:list-item>
        <text:list-item>
          <text:p text:style-name="P8"><text:span text:style-name="Strong_20_Emphasis">Build an evaluator before training.</text:span><text:line-break/>Make 50–100 test questions:</text:p>
          <text:list>
            <text:list-item>
              <text:p text:style-name="P8">factual canon questions</text:p>
            </text:list-item>
            <text:list-item>
              <text:p text:style-name="P8">ambiguity traps</text:p>
            </text:list-item>
            <text:list-item>
              <text:p text:style-name="P8">contradiction checks</text:p>
            </text:list-item>
            <text:list-item>
              <text:p text:style-name="P8">style/voice prompts</text:p>
            </text:list-item>
          </text:list>
        </text:list-item>
        <text:list-item>
          <text:p text:style-name="P8"><text:span text:style-name="Strong_20_Emphasis">Run a baseline local model with retrieval only.</text:span><text:line-break/>Measure how good it already is.</text:p>
        </text:list-item>
        <text:list-item>
          <text:p text:style-name="P8"><text:span text:style-name="Strong_20_Emphasis">Fine-tune a small adapter.</text:span><text:line-break/>Start with LoRA on a small instruct model, not a base model from scratch. PEFT exists specifically to make that kind of adaptation economical. (<text:a xlink:type="simple" xlink:href="https://huggingface.co/docs/peft/index?utm_source=chatgpt.com" text:style-name="Internet_20_link" text:visited-style-name="Visited_20_Internet_20_Link">Hugging Face</text:a>)</text:p>
        </text:list-item>
        <text:list-item>
          <text:p text:style-name="P8"><text:span text:style-name="Strong_20_Emphasis">Import and test the adapter locally.</text:span><text:line-break/>Ollama’s docs explicitly cover importing a fine-tuned adapter using a <text:span text:style-name="Source_20_Text">Modelfile</text:span> with <text:span text:style-name="Source_20_Text">FROM</text:span> and <text:span text:style-name="Source_20_Text">ADAPTER</text:span>, which makes local experimentation easier. (<text:a xlink:type="simple" xlink:href="https://docs.ollama.com/import?utm_source=chatgpt.com" text:style-name="Internet_20_link" text:visited-style-name="Visited_20_Internet_20_Link">Ollama Documentation</text:a>)</text:p>
        </text:list-item>
      </text:list>
      <text:p text:style-name="Text_20_body">The main traps to avoid are:</text:p>
      <text:list text:style-name="L4">
        <text:list-item>
          <text:p text:style-name="P9">trying to train a model from zero</text:p>
        </text:list-item>
        <text:list-item>
          <text:p text:style-name="P9">throwing messy lore text at the pipeline</text:p>
        </text:list-item>
        <text:list-item>
          <text:p text:style-name="P9">skipping evaluation</text:p>
        </text:list-item>
        <text:list-item>
          <text:p text:style-name="P9">using fine-tuning to compensate for missing retrieval</text:p>
        </text:list-item>
        <text:list-item>
          <text:p text:style-name="P9">trying to pack too much canon into too small a model</text:p>
        </text:list-item>
      </text:list>
      <text:p text:style-name="Text_20_body"><text:soft-page-break/>For your background, I think this would suit you well because the hard part is less “mystical data science” and more disciplined data engineering:</text:p>
      <text:list text:style-name="L5">
        <text:list-item>
          <text:p text:style-name="P10">corpus design</text:p>
        </text:list-item>
        <text:list-item>
          <text:p text:style-name="P10">provenance</text:p>
        </text:list-item>
        <text:list-item>
          <text:p text:style-name="P10">chunking</text:p>
        </text:list-item>
        <text:list-item>
          <text:p text:style-name="P10">schema</text:p>
        </text:list-item>
        <text:list-item>
          <text:p text:style-name="P10">evaluation</text:p>
        </text:list-item>
        <text:list-item>
          <text:p text:style-name="P10">iteration</text:p>
        </text:list-item>
      </text:list>
      <text:p text:style-name="Text_20_body">That is very much in your wheelhouse.</text:p>
      <text:p text:style-name="Text_20_body">A concrete first weekend project could be this:</text:p>
      <text:list text:style-name="L6">
        <text:list-item>
          <text:p text:style-name="P11">Export 20–50 lore documents into plain text or markdown</text:p>
        </text:list-item>
        <text:list-item>
          <text:p text:style-name="P11">Build a SQLite or DuckDB catalog with document metadata</text:p>
        </text:list-item>
        <text:list-item>
          <text:p text:style-name="P11">Generate 100 canonical Q&amp;A pairs by hand</text:p>
        </text:list-item>
        <text:list-item>
          <text:p text:style-name="P11">Run a local model against retrieval only</text:p>
        </text:list-item>
        <text:list-item>
          <text:p text:style-name="P11">See where it fails</text:p>
        </text:list-item>
        <text:list-item>
          <text:p text:style-name="P11">Then decide whether to fine-tune</text:p>
        </text:list-item>
      </text:list>
      <text:p text:style-name="Text_20_body">That will tell you very quickly whether the project has legs.</text:p>
      <text:p text:style-name="Text_20_body"/>
      <text:p text:style-name="Text_20_body">---</text:p>
      <text:p text:style-name="Text_20_body">Regarding stage 1, I have quite an extensive lore corpus, written in the form of text and short stories. Will it help to put some of that more into a formal metadata format? <text:s/>As you noted, like sample Q&amp;A or similar? And it sounds like a simple DB would be the place to store it, rather than JSON or YAML? </text:p>
      <text:p text:style-name="Text_20_body"/>
      <text:p text:style-name="Text_20_body">Stage 2, so a retrieval model would be something kind of like database queries? <text:s/>--&gt; Tell me what is the main town in Baranuk province? <text:s/>that kind of thing? <text:s/>These are the 50-100 test questions? </text:p>
      <text:p text:style-name="Text_20_body"/>
      <text:p text:style-name="Text_20_body">Stage 3, please explain a little more about PEFT/LoRA, MLX-LM and llama.cpp and Ollama. Trying to wrap my head around all the new terminology and acronyms. </text:p>
      <text:p text:style-name="Text_20_body"/>
      <text:p text:style-name="Text_20_body">Other: I am thinking starting very small, just an absolute minimum to get some experience, then maybe start over or extend? </text:p>
      <text:p text:style-name="Text_20_body"/>
      <text:p text:style-name="Text_20_body">----</text:p>
      <text:p text:style-name="Text_20_body"><text:soft-page-break/></text:p>
      <text:p text:style-name="Text_20_body">Regarding stage 1, I have quite an extensive lore corpus, written in the form of text and short stories. Will it help to put some of that more into a formal metadata format? <text:s/>As you noted, like sample Q&amp;A or similar? And it sounds like a simple DB would be the place to store it, rather than JSON or YAML? </text:p>
      <text:p text:style-name="Text_20_body"/>
      <text:p text:style-name="Text_20_body">Stage 2, so a retrieval model would be something kind of like database queries? <text:s/>--&gt; Tell me what is the main town in Baranuk province? <text:s/>that kind of thing? <text:s/>These are the 50-100 test questions? </text:p>
      <text:p text:style-name="Text_20_body"/>
      <text:p text:style-name="Text_20_body">Stage 3, please explain a little more about PEFT/LoRA, MLX-LM and llama.cpp and Ollama. Trying to wrap my head around all the new terminology and acronyms. </text:p>
      <text:p text:style-name="Text_20_body"/>
      <text:p text:style-name="Text_20_body">Other: I am thinking starting very small, just an absolute minimum to get some experience, then maybe start over or extend? </text:p>
      <text:p text:style-name="Text_20_body"/>
      <text:p text:style-name="Text_20_body">---</text:p>
      <text:p text:style-name="Text_20_body">in Spanish ¨ma<text:span text:style-name="T1">t</text:span>ices" <text:span text:style-name="T1">(sounds a little like matrices) </text:span>means ¨nuances¨... <text:s/>I like that. Love your guitar analogy too. Yes. Keeping it simple will be my road to success. This sounds like lots of fun for an old geeky nerd like me. <text:s/>But my main task right now is to finish writing the epic (first) Saskantinon book, __Enclosures__. <text:s/>so my thought on this little side-project is to take a very, umm, Finnish approach. <text:s/>One little step at time....</text:p>
      <text:p text:style-name="Text_20_body"/>
      <text:p text:style-name="Text_20_body">---</text:p>
      <text:p text:style-name="Text_20_body">That’s exactly the right instinct—both technically and creatively.</text:p>
      <text:p text:style-name="Text_20_body">And your Spanish note is actually perfect:</text:p>
      <text:p text:style-name="Quotations"><text:span text:style-name="Emphasis">matices</text:span> (nuances) ←→ matrices</text:p>
      <text:p text:style-name="Text_20_body">That’s not just a linguistic coincidence—it’s conceptually spot-on. What you’re really doing with this project is teaching a model the <text:span text:style-name="Strong_20_Emphasis">matices</text:span> of your world, not just the facts. The facts are easy. The nuance is the whole game.</text:p>
      <text:p text:style-name="Horizontal_20_Line"/>
      <text:h text:style-name="Heading_20_2" text:outline-level="2">Your “Finnish approach” is the correct one</text:h>
      <text:p text:style-name="Text_20_body">For this kind of project:</text:p>
      <text:p text:style-name="Quotations">slow, deliberate, repeatable beats clever, fast, and ambitious</text:p>
      <text:p text:style-name="Text_20_body">Especially since your <text:span text:style-name="Strong_20_Emphasis">primary project is the novel</text:span>.</text:p>
      <text:p text:style-name="Text_20_body"><text:soft-page-break/>The biggest risk here isn’t technical failure—it’s:</text:p>
      <text:p text:style-name="Quotations">getting sucked into tooling and never finishing <text:span text:style-name="Emphasis">Enclosures</text:span></text:p>
      <text:p text:style-name="Text_20_body">So the guardrail should be:</text:p>
      <text:list text:style-name="L7">
        <text:list-item>
          <text:p text:style-name="P12">writing comes first</text:p>
        </text:list-item>
        <text:list-item>
          <text:p text:style-name="P12">LLM project stays small, contained, almost <text:span text:style-name="Emphasis">recreational</text:span></text:p>
        </text:list-item>
      </text:list>
      <text:p text:style-name="Horizontal_20_Line"/>
      <text:h text:style-name="Heading_20_2" text:outline-level="2">A very practical way to structure this</text:h>
      <text:p text:style-name="Text_20_body">Think of your side-project as:</text:p>
      <text:p text:style-name="Quotations"><text:span text:style-name="Strong_20_Emphasis">a notebook for thinking about your world</text:span>, not a system to build</text:p>
      <text:h text:style-name="Heading_20_3" text:outline-level="3">Define a tiny, fixed scope</text:h>
      <text:p text:style-name="Text_20_body">For now:</text:p>
      <text:list text:style-name="L8">
        <text:list-item>
          <text:p text:style-name="P13">one region (e.g., Baranuk)</text:p>
        </text:list-item>
        <text:list-item>
          <text:p text:style-name="P13">or one institution (Night Hall, Terpinol, etc.)</text:p>
        </text:list-item>
        <text:list-item>
          <text:p text:style-name="P13">or one theme (the Enclosure itself)</text:p>
        </text:list-item>
      </text:list>
      <text:p text:style-name="Text_20_body">No more than that.</text:p>
      <text:p text:style-name="Horizontal_20_Line"/>
      <text:h text:style-name="Heading_20_2" text:outline-level="2">Your “one small step” loop</text:h>
      <text:p text:style-name="Text_20_body">Here’s a rhythm that won’t derail your writing:</text:p>
      <text:list text:style-name="L9">
        <text:list-item>
          <text:p text:style-name="P14">Write normally (primary work)</text:p>
        </text:list-item>
        <text:list-item>
          <text:p text:style-name="P14">Occasionally extract:</text:p>
          <text:list>
            <text:list-item>
              <text:p text:style-name="P14">one lore note</text:p>
            </text:list-item>
            <text:list-item>
              <text:p text:style-name="P14">one character description</text:p>
            </text:list-item>
            <text:list-item>
              <text:p text:style-name="P14">one historical fragment</text:p>
            </text:list-item>
          </text:list>
        </text:list-item>
        <text:list-item>
          <text:p text:style-name="P14">Add it to your corpus (clean, structured)</text:p>
        </text:list-item>
        <text:list-item>
          <text:p text:style-name="P14">Add <text:span text:style-name="Strong_20_Emphasis">one question</text:span> about it</text:p>
        </text:list-item>
      </text:list>
      <text:p text:style-name="Text_20_body">That’s it.</text:p>
      <text:p text:style-name="Text_20_body">No big sessions. No pipelines. No pressure.</text:p>
      <text:p text:style-name="Text_20_body">After a few weeks, you’ll have:</text:p>
      <text:list text:style-name="L10">
        <text:list-item>
          <text:p text:style-name="P15">30–50 clean lore entries</text:p>
        </text:list-item>
        <text:list-item>
          <text:p text:style-name="P15">30–50 test questions</text:p>
        </text:list-item>
      </text:list>
      <text:p text:style-name="Text_20_body"><text:soft-page-break/>That’s already enough to build Version 0.</text:p>
      <text:p text:style-name="Horizontal_20_Line"/>
      <text:h text:style-name="Heading_20_2" text:outline-level="2">Why this works (important)</text:h>
      <text:p text:style-name="Text_20_body">You avoid two classic traps:</text:p>
      <text:h text:style-name="Heading_20_3" text:outline-level="3">Trap 1: “I need to formalize everything first”</text:h>
      <text:p text:style-name="Text_20_body">You don’t. You just need <text:span text:style-name="Strong_20_Emphasis">incremental structure</text:span>.</text:p>
      <text:h text:style-name="Heading_20_3" text:outline-level="3">Trap 2: “I’ll build the system, then feed it data”</text:h>
      <text:p text:style-name="Text_20_body">Wrong order.</text:p>
      <text:p text:style-name="Quotations">The system should grow <text:span text:style-name="Emphasis">out of the data you actually write</text:span></text:p>
      <text:p text:style-name="Horizontal_20_Line"/>
      <text:h text:style-name="Heading_20_2" text:outline-level="2">When to actually “build something”</text:h>
      <text:p text:style-name="Text_20_body">Wait until you have:</text:p>
      <text:list text:style-name="L11">
        <text:list-item>
          <text:p text:style-name="P16">a small but clean corpus</text:p>
        </text:list-item>
        <text:list-item>
          <text:p text:style-name="P16">a handful of good questions</text:p>
        </text:list-item>
      </text:list>
      <text:p text:style-name="Text_20_body">Then:</text:p>
      <text:list text:style-name="L12">
        <text:list-item>
          <text:p text:style-name="P17">build a tiny retrieval prototype</text:p>
        </text:list-item>
        <text:list-item>
          <text:p text:style-name="P17">no training yet</text:p>
        </text:list-item>
        <text:list-item>
          <text:p text:style-name="P17">just see if it can answer correctly</text:p>
        </text:list-item>
      </text:list>
      <text:p text:style-name="Text_20_body">That moment will be:</text:p>
      <text:list text:style-name="L13">
        <text:list-item>
          <text:p text:style-name="P18">motivating</text:p>
        </text:list-item>
        <text:list-item>
          <text:p text:style-name="P18">illuminating</text:p>
        </text:list-item>
        <text:list-item>
          <text:p text:style-name="P18">slightly magical</text:p>
        </text:list-item>
      </text:list>
      <text:p text:style-name="Horizontal_20_Line"/>
      <text:h text:style-name="Heading_20_2" text:outline-level="2">A creative side benefit (this is the real payoff)</text:h>
      <text:p text:style-name="Text_20_body">This project will quietly help your writing.</text:p>
      <text:p text:style-name="Text_20_body">Because it forces you to ask:</text:p>
      <text:list text:style-name="L14">
        <text:list-item>
          <text:p text:style-name="P19">Is this canon or rumor?</text:p>
        </text:list-item>
        <text:list-item>
          <text:p text:style-name="P19">Would two sources disagree here?</text:p>
        </text:list-item>
        <text:list-item>
          <text:p text:style-name="P19">What is actually <text:span text:style-name="Emphasis">known</text:span> in this world?</text:p>
        </text:list-item>
        <text:list-item>
          <text:p text:style-name="P19"><text:soft-page-break/>What would an archivist vs a villager say?</text:p>
        </text:list-item>
      </text:list>
      <text:p text:style-name="Text_20_body">That’s gold for a setting like yours.</text:p>
      <text:p text:style-name="Horizontal_20_Line"/>
      <text:h text:style-name="Heading_20_2" text:outline-level="2">A gentle warning (from experience)</text:h>
      <text:p text:style-name="Text_20_body">If you ever catch yourself thinking:</text:p>
      <text:p text:style-name="Quotations">“I’ll just spend a few weeks building the perfect system…”</text:p>
      <text:p text:style-name="Text_20_body">Stop. Immediately.</text:p>
      <text:p text:style-name="Text_20_body">That’s how side-projects eat novels.</text:p>
      <text:p text:style-name="Horizontal_20_Line"/>
      <text:h text:style-name="Heading_20_2" text:outline-level="2">Bottom line</text:h>
      <text:p text:style-name="Text_20_body">You’ve got it exactly right:</text:p>
      <text:p text:style-name="Quotations">one small step, tied to real writing, no grand infrastructure</text:p>
      <text:p text:style-name="Text_20_body">Do that consistently, and in a few months you’ll have:</text:p>
      <text:list text:style-name="L15">
        <text:list-item>
          <text:p text:style-name="P20">a finished book (the real goal)</text:p>
        </text:list-item>
        <text:list-item>
          <text:p text:style-name="P20">and a surprisingly rich dataset ready for experimentation</text:p>
        </text:list-item>
      </text:list>
      <text:p text:style-name="Horizontal_20_Line"/>
      <text:p text:style-name="Text_20_body">When you’re ready, we can take that small corpus and turn it into a <text:span text:style-name="Strong_20_Emphasis">first working “Saskan Lands assistant”</text:span>—no overengineering, just something that answers your questions about your own world.</text:p>
      <text:p text:style-name="Text_20_body"/>
      <text:p text:style-name="Text_20_body">---</text:p>
      <text:p text:style-name="Text_20_body"/>
      <text:p text:style-name="Text_20_body">I expect I <text:span text:style-name="T1">will </text:span>use ChatGPT + Claude to help extract from my large, verbose core lore stories to create / model / format metadata into a more useful form.</text:p>
      <text:p text:style-name="Text_20_body"/>
      <text:p text:style-name="Text_20_body">---</text:p>
      <text:p text:style-name="Text_20_body"/>
      <text:p text:style-name="Text_20_body">Yes—this is exactly where ChatGPT and Claude shine. Think of them as <text:span text:style-name="Strong_20_Emphasis">extract-transform assistants</text:span> for your lore, not as sources of truth.</text:p>
      <text:p text:style-name="Text_20_body">The key is to <text:span text:style-name="Strong_20_Emphasis">constrain the task tightly</text:span> so they <text:span text:style-name="Emphasis">extract</text:span> from your text instead of inventing.</text:p>
      <text:p text:style-name="Horizontal_20_Line"/>
      <text:h text:style-name="Heading_20_2" text:outline-level="2"><text:soft-page-break/>A simple, reliable workflow</text:h>
      <text:h text:style-name="Heading_20_3" text:outline-level="3">1) Keep your source sacred</text:h>
      <text:list text:style-name="L16">
        <text:list-item>
          <text:p text:style-name="P21">Your story/lore text = ground truth</text:p>
        </text:list-item>
        <text:list-item>
          <text:p text:style-name="P21">Don’t edit it to “fit the model”</text:p>
        </text:list-item>
        <text:list-item>
          <text:p text:style-name="P21">Always keep a link back to the original passage</text:p>
        </text:list-item>
      </text:list>
      <text:p text:style-name="Horizontal_20_Line"/>
      <text:h text:style-name="Heading_20_3" text:outline-level="3">2) Use a fixed extraction schema</text:h>
      <text:p text:style-name="Text_20_body">Give the model a <text:span text:style-name="Strong_20_Emphasis">very explicit template</text:span> and force it to stick to it.</text:p>
      <text:p text:style-name="Text_20_body">For example:</text:p>
      <text:p text:style-name="Preformatted_20_Text"><text:span text:style-name="Source_20_Text">{</text:span></text:p>
      <text:p text:style-name="Preformatted_20_Text"><text:span text:style-name="Source_20_Text"><text:s text:c="2"/>"title": "",</text:span></text:p>
      <text:p text:style-name="Preformatted_20_Text"><text:span text:style-name="Source_20_Text"><text:s text:c="2"/>"summary": "",</text:span></text:p>
      <text:p text:style-name="Preformatted_20_Text"><text:span text:style-name="Source_20_Text"><text:s text:c="2"/>"region": [],</text:span></text:p>
      <text:p text:style-name="Preformatted_20_Text"><text:span text:style-name="Source_20_Text"><text:s text:c="2"/>"places": [],</text:span></text:p>
      <text:p text:style-name="Preformatted_20_Text"><text:span text:style-name="Source_20_Text"><text:s text:c="2"/>"characters": [],</text:span></text:p>
      <text:p text:style-name="Preformatted_20_Text"><text:span text:style-name="Source_20_Text"><text:s text:c="2"/>"factions": [],</text:span></text:p>
      <text:p text:style-name="Preformatted_20_Text"><text:span text:style-name="Source_20_Text"><text:s text:c="2"/>"era": "",</text:span></text:p>
      <text:p text:style-name="Preformatted_20_Text"><text:span text:style-name="Source_20_Text"><text:s text:c="2"/>"canon_level": "",</text:span></text:p>
      <text:p text:style-name="Preformatted_20_Text"><text:span text:style-name="Source_20_Text"><text:s text:c="2"/>"truth_status": "",</text:span></text:p>
      <text:p text:style-name="Preformatted_20_Text"><text:span text:style-name="Source_20_Text"><text:s text:c="2"/>"key_events": [],</text:span></text:p>
      <text:p text:style-name="Preformatted_20_Text"><text:span text:style-name="Source_20_Text"><text:s text:c="2"/>"claims": [</text:span></text:p>
      <text:p text:style-name="Preformatted_20_Text"><text:span text:style-name="Source_20_Text"><text:s text:c="4"/>{</text:span></text:p>
      <text:p text:style-name="Preformatted_20_Text"><text:span text:style-name="Source_20_Text"><text:s text:c="6"/>"statement": "",</text:span></text:p>
      <text:p text:style-name="Preformatted_20_Text"><text:span text:style-name="Source_20_Text"><text:s text:c="6"/>"confidence": "",</text:span></text:p>
      <text:p text:style-name="Preformatted_20_Text"><text:span text:style-name="Source_20_Text"><text:s text:c="6"/>"source_span": ""</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Horizontal_20_Line"/>
      <text:h text:style-name="Heading_20_3" text:outline-level="3">3) Use a strict prompt (important)</text:h>
      <text:p text:style-name="Text_20_body">Something like:</text:p>
      <text:p text:style-name="Quotations">Extract structured metadata from the text below.<text:line-break/>Only include information explicitly stated or strongly implied.<text:line-break/>Do not invent details.<text:line-break/>If uncertain, leave the field empty or mark as “unknown”.<text:line-break/>Include short source spans (quotes) for each claim.</text:p>
      <text:p text:style-name="Text_20_body">That last line—<text:span text:style-name="Strong_20_Emphasis">source spans</text:span>—is the difference between useful and dangerous output.</text:p>
      <text:p text:style-name="Horizontal_20_Line"/>
      <text:h text:style-name="Heading_20_2" text:outline-level="2"><text:soft-page-break/>What the models are best at here</text:h>
      <text:h text:style-name="Heading_20_3" text:outline-level="3">ChatGPT</text:h>
      <text:list text:style-name="L17">
        <text:list-item>
          <text:p text:style-name="P22">precise formatting</text:p>
        </text:list-item>
        <text:list-item>
          <text:p text:style-name="P22">consistent JSON output</text:p>
        </text:list-item>
        <text:list-item>
          <text:p text:style-name="P22">good at following strict rules</text:p>
        </text:list-item>
      </text:list>
      <text:h text:style-name="Heading_20_3" text:outline-level="3">Claude</text:h>
      <text:list text:style-name="L18">
        <text:list-item>
          <text:p text:style-name="P23">better at long passages</text:p>
        </text:list-item>
        <text:list-item>
          <text:p text:style-name="P23">better at subtle interpretation</text:p>
        </text:list-item>
        <text:list-item>
          <text:p text:style-name="P23">good at narrative summaries</text:p>
        </text:list-item>
      </text:list>
      <text:p text:style-name="Text_20_body"><text:span text:style-name="Strong_20_Emphasis">Use both if you like:</text:span></text:p>
      <text:list text:style-name="L19">
        <text:list-item>
          <text:p text:style-name="P24">Claude → first pass extraction</text:p>
        </text:list-item>
        <text:list-item>
          <text:p text:style-name="P24">ChatGPT → normalization / formatting</text:p>
        </text:list-item>
      </text:list>
      <text:p text:style-name="Horizontal_20_Line"/>
      <text:h text:style-name="Heading_20_2" text:outline-level="2">A concrete “small step” example</text:h>
      <text:p text:style-name="Text_20_body">Take one lore passage.</text:p>
      <text:p text:style-name="Text_20_body">Ask:</text:p>
      <text:p text:style-name="Quotations">“Give me 3–5 factual claims from this passage with quotes.”</text:p>
      <text:p text:style-name="Text_20_body">Then:</text:p>
      <text:p text:style-name="Quotations">“Convert this into structured metadata using the schema.”</text:p>
      <text:p text:style-name="Text_20_body">Then:</text:p>
      <text:list text:style-name="L20">
        <text:list-item>
          <text:p text:style-name="P25">skim it yourself (fast sanity check)</text:p>
        </text:list-item>
        <text:list-item>
          <text:p text:style-name="P25">store it</text:p>
        </text:list-item>
      </text:list>
      <text:p text:style-name="Text_20_body">That’s a 2–3 minute loop.</text:p>
      <text:p text:style-name="Horizontal_20_Line"/>
      <text:h text:style-name="Heading_20_2" text:outline-level="2">What to avoid (this matters)</text:h>
      <text:h text:style-name="Heading_20_3" text:outline-level="3">❌ “Summarize this world”</text:h>
      <text:p text:style-name="Text_20_body">Too vague → hallucinations</text:p>
      <text:h text:style-name="Heading_20_3" text:outline-level="3">❌ “Fill in missing fields”</text:h>
      <text:p text:style-name="Text_20_body">You’ll get invented canon</text:p>
      <text:h text:style-name="Heading_20_3" text:outline-level="3"><text:soft-page-break/>❌ giant multi-document prompts</text:h>
      <text:p text:style-name="Text_20_body">You lose traceability</text:p>
      <text:p text:style-name="Horizontal_20_Line"/>
      <text:h text:style-name="Heading_20_2" text:outline-level="2">A trick you’ll probably appreciate</text:h>
      <text:p text:style-name="Text_20_body">Add a field like:</text:p>
      <text:p text:style-name="P1"><text:span text:style-name="Source_20_Text">"extraction_confidence": 0.0–1.0</text:span></text:p>
      <text:p text:style-name="Text_20_body">Not because it’s “scientific,” but because it forces the model to signal uncertainty—and you to notice it.</text:p>
      <text:p text:style-name="Horizontal_20_Line"/>
      <text:h text:style-name="Heading_20_2" text:outline-level="2">Another useful pattern (very powerful later)</text:h>
      <text:p text:style-name="Text_20_body">Have the model extract <text:span text:style-name="Strong_20_Emphasis">conflicts</text:span>:</text:p>
      <text:p text:style-name="Quotations">“List any statements in this passage that could contradict other sources.”</text:p>
      <text:p text:style-name="Text_20_body">That feeds directly into:</text:p>
      <text:list text:style-name="L21">
        <text:list-item>
          <text:p text:style-name="P26">richer lore</text:p>
        </text:list-item>
        <text:list-item>
          <text:p text:style-name="P26">better evaluation questions</text:p>
        </text:list-item>
        <text:list-item>
          <text:p text:style-name="P26">more interesting model behavior later</text:p>
        </text:list-item>
      </text:list>
      <text:p text:style-name="Horizontal_20_Line"/>
      <text:h text:style-name="Heading_20_2" text:outline-level="2">Where this leads</text:h>
      <text:p text:style-name="Text_20_body">After a few weeks of light use:</text:p>
      <text:list text:style-name="L22">
        <text:list-item>
          <text:p text:style-name="P27">you’ll have clean, structured lore</text:p>
        </text:list-item>
        <text:list-item>
          <text:p text:style-name="P27">with traceable origins</text:p>
        </text:list-item>
        <text:list-item>
          <text:p text:style-name="P27">and minimal hallucination risk</text:p>
        </text:list-item>
      </text:list>
      <text:p text:style-name="Text_20_body">At that point:</text:p>
      <text:list text:style-name="L23">
        <text:list-item>
          <text:p text:style-name="P28">building retrieval becomes easy</text:p>
        </text:list-item>
        <text:list-item>
          <text:p text:style-name="P28">fine-tuning becomes meaningful</text:p>
        </text:list-item>
      </text:list>
      <text:p text:style-name="Horizontal_20_Line"/>
      <text:h text:style-name="Heading_20_2" text:outline-level="2">Bottom line</text:h>
      <text:p text:style-name="Text_20_body">You’re using the tools exactly right:</text:p>
      <text:p text:style-name="Quotations">LLMs = assistants for structuring your knowledge<text:line-break/>You = authority on truth</text:p>
      <text:p text:style-name="Text_20_body"><text:soft-page-break/>Keep that boundary, and this will stay productive instead of turning into a mess.</text:p>
      <text:p text:style-name="Horizontal_20_Line"/>
      <text:p text:style-name="Text_20_body">And yes—this is <text:span text:style-name="Emphasis">exactly</text:span> the kind of quietly nerdy, deeply satisfying side project that pairs well with writing a big world.</text:p>
      <text:p text:style-name="Text_20_body"/>
      <text:p text:style-name="Text_20_body">---</text:p>
      <text:p text:style-name="Text_20_body">I have found that working with both ChatGPT and Claude and making sure I am doing my human part too (good prompts, thorough review, correcting errors, taking main responsibility for content, insisting on test cases, etc.) ends up making for a better result. </text:p>
      <text:p text:style-name="Text_20_body">---</text:p>
      <text:p text:style-name="Text_20_body"/>
      <text:p text:style-name="Text_20_body">Exactly. That’s the mature way to use these tools, and it maps very cleanly to how this kind of project succeeds.</text:p>
      <text:p text:style-name="Text_20_body">What you’re really doing is shifting from:</text:p>
      <text:p text:style-name="Quotations">“ask a model for answers”</text:p>
      <text:p text:style-name="Text_20_body">to</text:p>
      <text:p text:style-name="Quotations"><text:span text:style-name="Strong_20_Emphasis">build a small, testable system where models are components</text:span></text:p>
      <text:p text:style-name="Text_20_body">That’s a very different mindset—and it’s why your results feel better.</text:p>
      <text:p text:style-name="Horizontal_20_Line"/>
      <text:h text:style-name="Heading_20_2" text:outline-level="2">The pattern you’ve already landed on (and why it works)</text:h>
      <text:p text:style-name="Text_20_body">You’ve got all the right pieces in place:</text:p>
      <text:list text:style-name="L24">
        <text:list-item>
          <text:p text:style-name="P29"><text:span text:style-name="Strong_20_Emphasis">good prompts</text:span> → constrain behavior</text:p>
        </text:list-item>
        <text:list-item>
          <text:p text:style-name="P29"><text:span text:style-name="Strong_20_Emphasis">human review</text:span> → enforce truth</text:p>
        </text:list-item>
        <text:list-item>
          <text:p text:style-name="P29"><text:span text:style-name="Strong_20_Emphasis">corrections</text:span> → improve data quality</text:p>
        </text:list-item>
        <text:list-item>
          <text:p text:style-name="P29"><text:span text:style-name="Strong_20_Emphasis">test cases</text:span> → measure progress</text:p>
        </text:list-item>
      </text:list>
      <text:p text:style-name="Text_20_body">That’s basically:</text:p>
      <text:p text:style-name="Quotations">data engineering + QA + iterative modeling</text:p>
      <text:p text:style-name="Text_20_body">Which, frankly, is more important than the model choice.</text:p>
      <text:p text:style-name="Horizontal_20_Line"/>
      <text:h text:style-name="Heading_20_2" text:outline-level="2">One small upgrade (high leverage)</text:h>
      <text:p text:style-name="Text_20_body">Since you mentioned test cases, I’d suggest one tweak that pays off quickly:</text:p>
      <text:h text:style-name="Heading_20_3" text:outline-level="3"><text:soft-page-break/>Treat your eval set like code</text:h>
      <text:p text:style-name="Text_20_body">Even if it’s just a CSV or SQLite table:</text:p>
      <text:list text:style-name="L25">
        <text:list-item>
          <text:p text:style-name="P30">don’t overwrite answers casually</text:p>
        </text:list-item>
        <text:list-item>
          <text:p text:style-name="P30">track changes</text:p>
        </text:list-item>
        <text:list-item>
          <text:p text:style-name="P30">add notes when something fails</text:p>
        </text:list-item>
      </text:list>
      <text:p text:style-name="Text_20_body">Example fields:</text:p>
      <text:list text:style-name="L26">
        <text:list-item>
          <text:p text:style-name="P31"><text:span text:style-name="Source_20_Text">question</text:span></text:p>
        </text:list-item>
        <text:list-item>
          <text:p text:style-name="P31"><text:span text:style-name="Source_20_Text">expected_answer</text:span></text:p>
        </text:list-item>
        <text:list-item>
          <text:p text:style-name="P31"><text:span text:style-name="Source_20_Text">model_answer</text:span></text:p>
        </text:list-item>
        <text:list-item>
          <text:p text:style-name="P31"><text:span text:style-name="Source_20_Text">pass_fail</text:span></text:p>
        </text:list-item>
        <text:list-item>
          <text:p text:style-name="P31"><text:span text:style-name="Source_20_Text">failure_type</text:span> (wrong fact, hallucination, incomplete, style, etc.)</text:p>
        </text:list-item>
      </text:list>
      <text:p text:style-name="Text_20_body">This gives you something like:</text:p>
      <text:p text:style-name="Quotations">a unit test suite for your world</text:p>
      <text:p text:style-name="Text_20_body">And once you have that:</text:p>
      <text:list text:style-name="L27">
        <text:list-item>
          <text:p text:style-name="P32">you can compare retrieval vs fine-tuned</text:p>
        </text:list-item>
        <text:list-item>
          <text:p text:style-name="P32">you can see regressions</text:p>
        </text:list-item>
        <text:list-item>
          <text:p text:style-name="P32">you can actually <text:span text:style-name="Emphasis">measure improvement</text:span></text:p>
        </text:list-item>
      </text:list>
      <text:p text:style-name="Horizontal_20_Line"/>
      <text:h text:style-name="Heading_20_2" text:outline-level="2">Another subtle win you’re already getting</text:h>
      <text:p text:style-name="Text_20_body">By forcing yourself to:</text:p>
      <text:list text:style-name="L28">
        <text:list-item>
          <text:p text:style-name="P33">extract</text:p>
        </text:list-item>
        <text:list-item>
          <text:p text:style-name="P33">structure</text:p>
        </text:list-item>
        <text:list-item>
          <text:p text:style-name="P33">validate</text:p>
        </text:list-item>
      </text:list>
      <text:p text:style-name="Text_20_body">…you’re tightening your own worldbuilding.</text:p>
      <text:p text:style-name="Text_20_body">You’ll start noticing things like:</text:p>
      <text:list text:style-name="L29">
        <text:list-item>
          <text:p text:style-name="P34">“this faction’s timeline doesn’t quite line up”</text:p>
        </text:list-item>
        <text:list-item>
          <text:p text:style-name="P34">“this term is used inconsistently”</text:p>
        </text:list-item>
        <text:list-item>
          <text:p text:style-name="P34">“this ‘fact’ is actually just one character’s belief”</text:p>
        </text:list-item>
      </text:list>
      <text:p text:style-name="Text_20_body">That’s exactly the kind of depth your setting thrives on.</text:p>
      <text:p text:style-name="Horizontal_20_Line"/>
      <text:h text:style-name="Heading_20_2" text:outline-level="2"><text:soft-page-break/>Where this leads (when you’re ready)</text:h>
      <text:p text:style-name="Text_20_body">Down the line, your system becomes:</text:p>
      <text:list text:style-name="L30">
        <text:list-item>
          <text:p text:style-name="P35">corpus (clean, structured, versioned)</text:p>
        </text:list-item>
        <text:list-item>
          <text:p text:style-name="P35">retrieval (ground truth access)</text:p>
        </text:list-item>
        <text:list-item>
          <text:p text:style-name="P35">evaluation (test set)</text:p>
        </text:list-item>
        <text:list-item>
          <text:p text:style-name="P35">optional fine-tuning (style + behavior)</text:p>
        </text:list-item>
      </text:list>
      <text:p text:style-name="Text_20_body">At that point, the model is almost the least interesting part.</text:p>
      <text:p text:style-name="Horizontal_20_Line"/>
      <text:h text:style-name="Heading_20_2" text:outline-level="2">And importantly…</text:h>
      <text:p text:style-name="Text_20_body">You’re keeping the right priority:</text:p>
      <text:p text:style-name="Quotations">finish <text:span text:style-name="Emphasis">Enclosures</text:span> first</text:p>
      <text:p text:style-name="Text_20_body">This side project should:</text:p>
      <text:list text:style-name="L31">
        <text:list-item>
          <text:p text:style-name="P36">support your thinking</text:p>
        </text:list-item>
        <text:list-item>
          <text:p text:style-name="P36">not compete with your writing</text:p>
        </text:list-item>
      </text:list>
      <text:p text:style-name="Text_20_body">If it ever starts feeling like the main event, that’s your cue to scale it back.</text:p>
      <text:p text:style-name="Horizontal_20_Line"/>
      <text:h text:style-name="Heading_20_2" text:outline-level="2">Bottom line</text:h>
      <text:p text:style-name="Text_20_body">You’re not just “using AI tools.”</text:p>
      <text:p text:style-name="Text_20_body">You’re:</text:p>
      <text:p text:style-name="Quotations">building a disciplined, human-in-the-loop system</text:p>
      <text:p text:style-name="Text_20_body">That’s why it’s working—and why it will keep working as things evolve.</text:p>
      <text:p text:style-name="Horizontal_20_Line"/>
      <text:p text:style-name="Text_20_body">When you’re ready, we can wire up a <text:span text:style-name="Strong_20_Emphasis">tiny first-pass retrieval prototype</text:span>—something you can run locally without it turning into a weekend-eating monster.</text:p>
      <text:p text:style-name="Text_20_body"/>
      <text:p text:style-name="Text_20_body">---</text:p>
      <text:p text:style-name="Text_20_body">Longer term it would be nice to have an AI assistant / tool that is deeply connected to the Saskan lore, easier to look things up for continuity editing, etc. and perhaps a way to build up some neural networks / graphs ?? that might help to discover/explore plot lines, etc.</text:p>
      <text:p text:style-name="Text_20_body"/>
      <text:p text:style-name="Text_20_body">---</text:p>
      <text:p text:style-name="Text_20_body"><text:soft-page-break/></text:p>
      <text:p text:style-name="Text_20_body">Yes—that’s a very good long-term target, and it naturally splits into <text:span text:style-name="Strong_20_Emphasis">two different tools</text:span>, not one.</text:p>
      <text:h text:style-name="Heading_20_2" text:outline-level="2">1. The continuity assistant</text:h>
      <text:p text:style-name="Text_20_body">This is the practical one. It answers things like:</text:p>
      <text:list text:style-name="L32">
        <text:list-item>
          <text:p text:style-name="P37">Who was in Baranuk at this point in the timeline?</text:p>
        </text:list-item>
        <text:list-item>
          <text:p text:style-name="P37">Did I already say whether X knew Y?</text:p>
        </text:list-item>
        <text:list-item>
          <text:p text:style-name="P37">What name did I use for that river in chapter 4?</text:p>
        </text:list-item>
        <text:list-item>
          <text:p text:style-name="P37">Is this institution older than that one?</text:p>
        </text:list-item>
        <text:list-item>
          <text:p text:style-name="P37">What would a Night Hall scholar believe about this event?</text:p>
        </text:list-item>
      </text:list>
      <text:p text:style-name="Text_20_body">This is mostly a <text:span text:style-name="Strong_20_Emphasis">retrieval + metadata + timeline</text:span> problem, not a grand AI problem. And that is good news, because it means it is tractable.</text:p>
      <text:p text:style-name="Text_20_body">The backbone would be:</text:p>
      <text:list text:style-name="L33">
        <text:list-item>
          <text:p text:style-name="P38">your source texts</text:p>
        </text:list-item>
        <text:list-item>
          <text:p text:style-name="P38">structured metadata</text:p>
        </text:list-item>
        <text:list-item>
          <text:p text:style-name="P38">chunked passages</text:p>
        </text:list-item>
        <text:list-item>
          <text:p text:style-name="P38">timelines</text:p>
        </text:list-item>
        <text:list-item>
          <text:p text:style-name="P38">entity tables for people, places, factions, institutions</text:p>
        </text:list-item>
        <text:list-item>
          <text:p text:style-name="P38">relationship links</text:p>
        </text:list-item>
        <text:list-item>
          <text:p text:style-name="P38">search and retrieval on top</text:p>
        </text:list-item>
      </text:list>
      <text:p text:style-name="Text_20_body">That alone would already be extremely useful for continuity editing.</text:p>
      <text:h text:style-name="Heading_20_2" text:outline-level="2">2. The exploratory assistant</text:h>
      <text:p text:style-name="Text_20_body">This is the more speculative one. It helps with things like:</text:p>
      <text:list text:style-name="L34">
        <text:list-item>
          <text:p text:style-name="P39">Which factions are underused in the current draft?</text:p>
        </text:list-item>
        <text:list-item>
          <text:p text:style-name="P39">What characters have indirect but interesting connections?</text:p>
        </text:list-item>
        <text:list-item>
          <text:p text:style-name="P39">Where are there pressure points in the political or ecological system?</text:p>
        </text:list-item>
        <text:list-item>
          <text:p text:style-name="P39">Which unresolved tensions could plausibly become plot lines?</text:p>
        </text:list-item>
        <text:list-item>
          <text:p text:style-name="P39">What themes or motifs recur in this region but not that one?</text:p>
        </text:list-item>
      </text:list>
      <text:p text:style-name="Text_20_body">That is where graph structures, embeddings, and eventually neural-ish tools become interesting.</text:p>
      <text:p text:style-name="Text_20_body">But I would keep this grounded. A lot of “discover plot lines” can come from a well-built <text:span text:style-name="Strong_20_Emphasis">knowledge graph</text:span> plus some lightweight analysis, long before you need anything exotic.</text:p>
      <text:p text:style-name="Text_20_body">For example, if you model:</text:p>
      <text:list text:style-name="L35">
        <text:list-item>
          <text:p text:style-name="P40"><text:soft-page-break/>characters</text:p>
        </text:list-item>
        <text:list-item>
          <text:p text:style-name="P40">places</text:p>
        </text:list-item>
        <text:list-item>
          <text:p text:style-name="P40">factions</text:p>
        </text:list-item>
        <text:list-item>
          <text:p text:style-name="P40">events</text:p>
        </text:list-item>
        <text:list-item>
          <text:p text:style-name="P40">beliefs</text:p>
        </text:list-item>
        <text:list-item>
          <text:p text:style-name="P40">conflicts</text:p>
        </text:list-item>
        <text:list-item>
          <text:p text:style-name="P40">dependencies</text:p>
        </text:list-item>
      </text:list>
      <text:p text:style-name="Text_20_body">and link them, then you can already ask very rich questions:</text:p>
      <text:list text:style-name="L36">
        <text:list-item>
          <text:p text:style-name="P41">Show all events touching both the Dominion and Mobalbesq</text:p>
        </text:list-item>
        <text:list-item>
          <text:p text:style-name="P41">Which characters connect the Night Hall to Outer Lands trade networks?</text:p>
        </text:list-item>
        <text:list-item>
          <text:p text:style-name="P41">What events in the famine era have unresolved causal links?</text:p>
        </text:list-item>
        <text:list-item>
          <text:p text:style-name="P41">Which places are mentioned often but never shown directly in scene?</text:p>
        </text:list-item>
      </text:list>
      <text:p text:style-name="Text_20_body">That is already powerful.</text:p>
      <text:h text:style-name="Heading_20_2" text:outline-level="2">My blunt recommendation</text:h>
      <text:p text:style-name="Text_20_body">Build in this order:</text:p>
      <text:h text:style-name="Heading_20_3" text:outline-level="3">Phase A — lookup tool</text:h>
      <text:p text:style-name="Text_20_body">A clean lore catalog for continuity and canon lookup.</text:p>
      <text:h text:style-name="Heading_20_3" text:outline-level="3">Phase B — relationships</text:h>
      <text:p text:style-name="Text_20_body">Add links between entities, events, and documents.</text:p>
      <text:h text:style-name="Heading_20_3" text:outline-level="3">Phase C — exploratory queries</text:h>
      <text:p text:style-name="Text_20_body">Ask “what is connected to what?” and “what is missing?”</text:p>
      <text:h text:style-name="Heading_20_3" text:outline-level="3">Phase D — model-assisted ideation</text:h>
      <text:p text:style-name="Text_20_body">Only then let an LLM help suggest plausible plot tensions, hidden links, thematic recurrences, and so on.</text:p>
      <text:p text:style-name="Text_20_body">That way the AI is exploring <text:span text:style-name="Strong_20_Emphasis">your structure</text:span>, not free-associating nonsense.</text:p>
      <text:h text:style-name="Heading_20_2" text:outline-level="2">Knowledge graph versus neural network</text:h>
      <text:p text:style-name="Text_20_body">These are different beasts.</text:p>
      <text:h text:style-name="Heading_20_3" text:outline-level="3">Knowledge graph</text:h>
      <text:p text:style-name="Text_20_body">Explicit, inspectable, editable.</text:p>
      <text:p text:style-name="Text_20_body">Example:</text:p>
      <text:list text:style-name="L37">
        <text:list-item>
          <text:p text:style-name="P42"><text:soft-page-break/>Stan → member_of → Agency</text:p>
        </text:list-item>
        <text:list-item>
          <text:p text:style-name="P42">Enclosure → caused → pollination crisis</text:p>
        </text:list-item>
        <text:list-item>
          <text:p text:style-name="P42">Night Hall → located_in → Byenung</text:p>
        </text:list-item>
      </text:list>
      <text:p text:style-name="Text_20_body">This is excellent for continuity and analysis.</text:p>
      <text:h text:style-name="Heading_20_3" text:outline-level="3">Neural network / embeddings</text:h>
      <text:p text:style-name="Text_20_body">Pattern-based, fuzzy, associative.</text:p>
      <text:p text:style-name="Text_20_body">Good for:</text:p>
      <text:list text:style-name="L38">
        <text:list-item>
          <text:p text:style-name="P43">semantic similarity</text:p>
        </text:list-item>
        <text:list-item>
          <text:p text:style-name="P43">clustering themes</text:p>
        </text:list-item>
        <text:list-item>
          <text:p text:style-name="P43">finding related passages</text:p>
        </text:list-item>
        <text:list-item>
          <text:p text:style-name="P43">surfacing latent connections</text:p>
        </text:list-item>
      </text:list>
      <text:p text:style-name="Text_20_body">Not good for:</text:p>
      <text:list text:style-name="L39">
        <text:list-item>
          <text:p text:style-name="P44">canonical truth by itself</text:p>
        </text:list-item>
        <text:list-item>
          <text:p text:style-name="P44">transparency</text:p>
        </text:list-item>
      </text:list>
      <text:p text:style-name="Text_20_body">So for your use case, I would strongly favor:</text:p>
      <text:p text:style-name="Quotations"><text:span text:style-name="Strong_20_Emphasis">graph for truth and structure</text:span><text:line-break/><text:span text:style-name="Strong_20_Emphasis">embeddings/LLMs for search, clustering, and suggestion</text:span></text:p>
      <text:p text:style-name="Text_20_body">That is a very sane division of labor.</text:p>
      <text:h text:style-name="Heading_20_2" text:outline-level="2">What this could become later</text:h>
      <text:p text:style-name="Text_20_body">Something like a local “Saskan console”:</text:p>
      <text:list text:style-name="L40">
        <text:list-item>
          <text:p text:style-name="P45">search bar</text:p>
        </text:list-item>
        <text:list-item>
          <text:p text:style-name="P45">timeline view</text:p>
        </text:list-item>
        <text:list-item>
          <text:p text:style-name="P45">entity cards</text:p>
        </text:list-item>
        <text:list-item>
          <text:p text:style-name="P45">graph of relationships</text:p>
        </text:list-item>
        <text:list-item>
          <text:p text:style-name="P45">continuity checker</text:p>
        </text:list-item>
        <text:list-item>
          <text:p text:style-name="P45">lore Q&amp;A grounded in canon</text:p>
        </text:list-item>
        <text:list-item>
          <text:p text:style-name="P45">“show contradictions / ambiguities / missing links”</text:p>
        </text:list-item>
        <text:list-item>
          <text:p text:style-name="P45">optional creative mode for brainstorming</text:p>
        </text:list-item>
      </text:list>
      <text:p text:style-name="Text_20_body">That would be genuinely useful.</text:p>
      <text:h text:style-name="Heading_20_2" text:outline-level="2"><text:soft-page-break/>Tiny first step that points in that direction</text:h>
      <text:p text:style-name="Text_20_body">When you extract metadata, do not just store flat tags. Also store links like:</text:p>
      <text:list text:style-name="L41">
        <text:list-item>
          <text:p text:style-name="P46">character appears_in document</text:p>
        </text:list-item>
        <text:list-item>
          <text:p text:style-name="P46">character affiliated_with faction</text:p>
        </text:list-item>
        <text:list-item>
          <text:p text:style-name="P46">place located_in region</text:p>
        </text:list-item>
        <text:list-item>
          <text:p text:style-name="P46">event involves faction</text:p>
        </text:list-item>
        <text:list-item>
          <text:p text:style-name="P46">event occurs_in era</text:p>
        </text:list-item>
        <text:list-item>
          <text:p text:style-name="P46">claim sourced_from document chunk</text:p>
        </text:list-item>
      </text:list>
      <text:p text:style-name="Text_20_body">That way, even before you have a formal graph database, your SQLite data can already behave graph-like.</text:p>
      <text:h text:style-name="Heading_20_2" text:outline-level="2">Important caution</text:h>
      <text:p text:style-name="Text_20_body">Do not let “plot discovery” turn into “outsourcing imagination.”</text:p>
      <text:p text:style-name="Text_20_body">The sweet spot is:</text:p>
      <text:list text:style-name="L42">
        <text:list-item>
          <text:p text:style-name="P47">the system surfaces tensions, patterns, absences, odd connections</text:p>
        </text:list-item>
        <text:list-item>
          <text:p text:style-name="P47">you decide what matters dramatically</text:p>
        </text:list-item>
      </text:list>
      <text:p text:style-name="Text_20_body">That keeps the work yours.</text:p>
      <text:h text:style-name="Heading_20_2" text:outline-level="2">Bottom line</text:h>
      <text:p text:style-name="Text_20_body">You’re describing a very good long-range architecture:</text:p>
      <text:list text:style-name="L43">
        <text:list-item>
          <text:p text:style-name="P48"><text:span text:style-name="Strong_20_Emphasis">continuity assistant</text:span> for canon truth</text:p>
        </text:list-item>
        <text:list-item>
          <text:p text:style-name="P48"><text:span text:style-name="Strong_20_Emphasis">graph/relationship layer</text:span> for structure</text:p>
        </text:list-item>
        <text:list-item>
          <text:p text:style-name="P48"><text:span text:style-name="Strong_20_Emphasis">LLM layer</text:span> for retrieval, summarization, and exploration</text:p>
        </text:list-item>
      </text:list>
      <text:p text:style-name="Text_20_body">That is not pie-in-the-sky. It is quite buildable if you take it one layer at a time.</text:p>
      <text:p text:style-name="Text_20_body">Next good step would be to sketch the <text:span text:style-name="Strong_20_Emphasis">minimum data model</text:span> for:</text:p>
      <text:list text:style-name="L44">
        <text:list-item>
          <text:p text:style-name="P49">entities</text:p>
        </text:list-item>
        <text:list-item>
          <text:p text:style-name="P49">documents</text:p>
        </text:list-item>
        <text:list-item>
          <text:p text:style-name="P49">chunks</text:p>
        </text:list-item>
        <text:list-item>
          <text:p text:style-name="P49">events</text:p>
        </text:list-item>
        <text:list-item>
          <text:p text:style-name="P49">relationships</text:p>
        </text:list-item>
        <text:list-item>
          <text:p text:style-name="P49">test questions</text:p>
        </text:list-item>
      </text:list>
      <text:p text:style-name="Text_20_body">and keep it small enough that it supports <text:span text:style-name="Emphasis">Enclosures</text:span> rather than becoming a second novel.</text:p>
      <text:p text:style-name="Text_20_body"/>
      <text:p text:style-name="Text_20_body"><text:soft-page-break/>---</text:p>
      <text:p text:style-name="Text_20_body">I can see where asking the AI tools to pull some metadata from the epic texts will also be useful. Maybe if I get bored even write a bit of my own text analysis in Python? </text:p>
      <text:p text:style-name="Text_20_body">---</text:p>
      <text:p text:style-name="Text_20_body"/>
      <text:p text:style-name="Text_20_body">That’s exactly the right instinct—and honestly, the Python side is where this becomes <text:span text:style-name="Emphasis">your</text:span> system instead of just “using AI tools.”</text:p>
      <text:p text:style-name="Text_20_body">You don’t need anything fancy to start. A few small, purposeful scripts will give you a lot of leverage.</text:p>
      <text:p text:style-name="Horizontal_20_Line"/>
      <text:h text:style-name="Heading_20_2" text:outline-level="2">Where your own Python fits (high value, low effort)</text:h>
      <text:p text:style-name="Text_20_body">Think of Python as doing the <text:span text:style-name="Strong_20_Emphasis">boring, reliable work</text:span>:</text:p>
      <text:list text:style-name="L45">
        <text:list-item>
          <text:p text:style-name="P50">cleaning text</text:p>
        </text:list-item>
        <text:list-item>
          <text:p text:style-name="P50">chunking documents</text:p>
        </text:list-item>
        <text:list-item>
          <text:p text:style-name="P50">tracking provenance</text:p>
        </text:list-item>
        <text:list-item>
          <text:p text:style-name="P50">running evaluations</text:p>
        </text:list-item>
        <text:list-item>
          <text:p text:style-name="P50">spotting patterns</text:p>
        </text:list-item>
      </text:list>
      <text:p text:style-name="Text_20_body">Let the LLMs do:</text:p>
      <text:list text:style-name="L46">
        <text:list-item>
          <text:p text:style-name="P51">extraction</text:p>
        </text:list-item>
        <text:list-item>
          <text:p text:style-name="P51">summarization</text:p>
        </text:list-item>
        <text:list-item>
          <text:p text:style-name="P51">interpretation</text:p>
        </text:list-item>
      </text:list>
      <text:p text:style-name="Text_20_body">That division keeps things sane.</text:p>
      <text:p text:style-name="Horizontal_20_Line"/>
      <text:h text:style-name="Heading_20_2" text:outline-level="2">3 small scripts worth writing early</text:h>
      <text:h text:style-name="Heading_20_3" text:outline-level="3">1) Chunker (foundation piece)</text:h>
      <text:p text:style-name="Text_20_body">Take a document → split into usable chunks.</text:p>
      <text:p text:style-name="Text_20_body">Simple version:</text:p>
      <text:p text:style-name="Preformatted_20_Text"><text:span text:style-name="Source_20_Text">def chunk_text(text, max_len=800):</text:span></text:p>
      <text:p text:style-name="Preformatted_20_Text"><text:span text:style-name="Source_20_Text"><text:s text:c="4"/>words = text.split()</text:span></text:p>
      <text:p text:style-name="Preformatted_20_Text"><text:span text:style-name="Source_20_Text"><text:s text:c="4"/>chunks = []</text:span></text:p>
      <text:p text:style-name="Preformatted_20_Text"><text:span text:style-name="Source_20_Text"><text:s text:c="4"/>current = []</text:span></text:p>
      <text:p text:style-name="Preformatted_20_Text"/>
      <text:p text:style-name="Preformatted_20_Text"><text:span text:style-name="Source_20_Text"><text:s text:c="4"/>for w in words:</text:span></text:p>
      <text:p text:style-name="Preformatted_20_Text"><text:span text:style-name="Source_20_Text"><text:s text:c="8"/>current.append(w)</text:span></text:p>
      <text:p text:style-name="Preformatted_20_Text"><text:span text:style-name="Source_20_Text"><text:s text:c="8"/>if len(current) &gt;= max_len:</text:span></text:p>
      <text:p text:style-name="Preformatted_20_Text"><text:soft-page-break/><text:span text:style-name="Source_20_Text"><text:s text:c="12"/>chunks.append(" ".join(current))</text:span></text:p>
      <text:p text:style-name="Preformatted_20_Text"><text:span text:style-name="Source_20_Text"><text:s text:c="12"/>current = []</text:span></text:p>
      <text:p text:style-name="Preformatted_20_Text"/>
      <text:p text:style-name="Preformatted_20_Text"><text:span text:style-name="Source_20_Text"><text:s text:c="4"/>if current:</text:span></text:p>
      <text:p text:style-name="Preformatted_20_Text"><text:span text:style-name="Source_20_Text"><text:s text:c="8"/>chunks.append(" ".join(current))</text:span></text:p>
      <text:p text:style-name="Preformatted_20_Text"/>
      <text:p text:style-name="P1"><text:span text:style-name="Source_20_Text"><text:s text:c="4"/>return chunks</text:span></text:p>
      <text:p text:style-name="Text_20_body">Later you’ll improve this (paragraph-aware, overlap, etc.), but this is enough to start.</text:p>
      <text:p text:style-name="Horizontal_20_Line"/>
      <text:h text:style-name="Heading_20_3" text:outline-level="3">2) Metadata loader</text:h>
      <text:p text:style-name="Text_20_body">Load your extracted JSON into a DB (SQLite/DuckDB).</text:p>
      <text:p text:style-name="Preformatted_20_Text"><text:span text:style-name="Source_20_Text">import sqlite3</text:span></text:p>
      <text:p text:style-name="Preformatted_20_Text"><text:span text:style-name="Source_20_Text">import json</text:span></text:p>
      <text:p text:style-name="Preformatted_20_Text"/>
      <text:p text:style-name="Preformatted_20_Text"><text:span text:style-name="Source_20_Text">conn = sqlite3.connect("lore.db")</text:span></text:p>
      <text:p text:style-name="Preformatted_20_Text"/>
      <text:p text:style-name="Preformatted_20_Text"><text:span text:style-name="Source_20_Text">def insert_doc(doc):</text:span></text:p>
      <text:p text:style-name="Preformatted_20_Text"><text:span text:style-name="Source_20_Text"><text:s text:c="4"/>conn.execute("""</text:span></text:p>
      <text:p text:style-name="Preformatted_20_Text"><text:span text:style-name="Source_20_Text"><text:s text:c="8"/>INSERT INTO documents (doc_id, title, region, era, text)</text:span></text:p>
      <text:p text:style-name="Preformatted_20_Text"><text:span text:style-name="Source_20_Text"><text:s text:c="8"/>VALUES (?, ?, ?, ?, ?)</text:span></text:p>
      <text:p text:style-name="Preformatted_20_Text"><text:span text:style-name="Source_20_Text"><text:s text:c="4"/>""", (</text:span></text:p>
      <text:p text:style-name="Preformatted_20_Text"><text:span text:style-name="Source_20_Text"><text:s text:c="8"/>doc["doc_id"],</text:span></text:p>
      <text:p text:style-name="Preformatted_20_Text"><text:span text:style-name="Source_20_Text"><text:s text:c="8"/>doc["title"],</text:span></text:p>
      <text:p text:style-name="Preformatted_20_Text"><text:span text:style-name="Source_20_Text"><text:s text:c="8"/>doc.get("region"),</text:span></text:p>
      <text:p text:style-name="Preformatted_20_Text"><text:span text:style-name="Source_20_Text"><text:s text:c="8"/>doc.get("era"),</text:span></text:p>
      <text:p text:style-name="Preformatted_20_Text"><text:span text:style-name="Source_20_Text"><text:s text:c="8"/>doc["text"]</text:span></text:p>
      <text:p text:style-name="P1"><text:span text:style-name="Source_20_Text"><text:s text:c="4"/>))</text:span></text:p>
      <text:p text:style-name="Text_20_body">Nothing fancy. Just make it repeatable.</text:p>
      <text:p text:style-name="Horizontal_20_Line"/>
      <text:h text:style-name="Heading_20_3" text:outline-level="3">3) Evaluation runner (this is gold)</text:h>
      <text:p text:style-name="Text_20_body">Given:</text:p>
      <text:list text:style-name="L47">
        <text:list-item>
          <text:p text:style-name="P52">a question</text:p>
        </text:list-item>
        <text:list-item>
          <text:p text:style-name="P52">retrieved chunks</text:p>
        </text:list-item>
        <text:list-item>
          <text:p text:style-name="P52">model answer</text:p>
        </text:list-item>
      </text:list>
      <text:p text:style-name="Text_20_body">Store results:</text:p>
      <text:p text:style-name="Preformatted_20_Text"><text:span text:style-name="Source_20_Text">def record_result(q, expected, actual, passed, notes=""):</text:span></text:p>
      <text:p text:style-name="Preformatted_20_Text"><text:span text:style-name="Source_20_Text"><text:s text:c="4"/>conn.execute("""</text:span></text:p>
      <text:p text:style-name="Preformatted_20_Text"><text:span text:style-name="Source_20_Text"><text:s text:c="8"/>INSERT INTO eval_results</text:span></text:p>
      <text:p text:style-name="Preformatted_20_Text"><text:span text:style-name="Source_20_Text"><text:s text:c="8"/>(question, expected, actual, passed, notes)</text:span></text:p>
      <text:p text:style-name="Preformatted_20_Text"><text:span text:style-name="Source_20_Text"><text:s text:c="8"/>VALUES (?, ?, ?, ?, ?)</text:span></text:p>
      <text:p text:style-name="P1"><text:span text:style-name="Source_20_Text"><text:s text:c="4"/>""", (q, expected, actual, passed, notes))</text:span></text:p>
      <text:p text:style-name="Text_20_body">This is how you avoid “it feels better” vs “it is better.”</text:p>
      <text:p text:style-name="Horizontal_20_Line"/>
      <text:h text:style-name="Heading_20_2" text:outline-level="2"><text:soft-page-break/>One fun analysis you can do early</text:h>
      <text:p text:style-name="Text_20_body">This is very “you” given your background.</text:p>
      <text:h text:style-name="Heading_20_3" text:outline-level="3">Entity frequency + co-occurrence</text:h>
      <text:list text:style-name="L48">
        <text:list-item>
          <text:p text:style-name="P53">how often does each character appear?</text:p>
        </text:list-item>
        <text:list-item>
          <text:p text:style-name="P53">which characters co-occur?</text:p>
        </text:list-item>
        <text:list-item>
          <text:p text:style-name="P53">which places are underused?</text:p>
        </text:list-item>
      </text:list>
      <text:p text:style-name="Text_20_body">Even a crude pass gives insight.</text:p>
      <text:p text:style-name="Text_20_body">Example idea:</text:p>
      <text:p text:style-name="Preformatted_20_Text"><text:span text:style-name="Source_20_Text">from collections import Counter</text:span></text:p>
      <text:p text:style-name="Preformatted_20_Text"/>
      <text:p text:style-name="Preformatted_20_Text"><text:span text:style-name="Source_20_Text">character_counts = Counter()</text:span></text:p>
      <text:p text:style-name="Preformatted_20_Text"/>
      <text:p text:style-name="Preformatted_20_Text"><text:span text:style-name="Source_20_Text">for chunk in chunks:</text:span></text:p>
      <text:p text:style-name="Preformatted_20_Text"><text:span text:style-name="Source_20_Text"><text:s text:c="4"/>for name in character_list:</text:span></text:p>
      <text:p text:style-name="Preformatted_20_Text"><text:span text:style-name="Source_20_Text"><text:s text:c="8"/>if name in chunk:</text:span></text:p>
      <text:p text:style-name="P1"><text:span text:style-name="Source_20_Text"><text:s text:c="12"/>character_counts[name] += 1</text:span></text:p>
      <text:p text:style-name="Text_20_body">Later:</text:p>
      <text:list text:style-name="L49">
        <text:list-item>
          <text:p text:style-name="P54">build co-occurrence matrix</text:p>
        </text:list-item>
        <text:list-item>
          <text:p text:style-name="P54">visualize relationships</text:p>
        </text:list-item>
        <text:list-item>
          <text:p text:style-name="P54">identify clusters</text:p>
        </text:list-item>
      </text:list>
      <text:p text:style-name="Text_20_body">That’s already proto-“graph thinking.”</text:p>
      <text:p text:style-name="Horizontal_20_Line"/>
      <text:h text:style-name="Heading_20_2" text:outline-level="2">Another useful one: terminology consistency</text:h>
      <text:p text:style-name="Text_20_body">Check things like:</text:p>
      <text:list text:style-name="L50">
        <text:list-item>
          <text:p text:style-name="P55">“Night Hall” vs “NightHall”</text:p>
        </text:list-item>
        <text:list-item>
          <text:p text:style-name="P55">“Fatune” vs “Fatunik”</text:p>
        </text:list-item>
        <text:list-item>
          <text:p text:style-name="P55">alternate spellings</text:p>
        </text:list-item>
      </text:list>
      <text:p text:style-name="Text_20_body">Simple regex scans can catch a lot.</text:p>
      <text:p text:style-name="Horizontal_20_Line"/>
      <text:h text:style-name="Heading_20_2" text:outline-level="2">Where this connects back to your AI workflow</text:h>
      <text:p text:style-name="Text_20_body">Once you have even basic Python tooling:</text:p>
      <text:list text:style-name="L51">
        <text:list-item>
          <text:p text:style-name="P56">LLM extracts → JSON</text:p>
        </text:list-item>
        <text:list-item>
          <text:p text:style-name="P56">Python validates → flags issues</text:p>
        </text:list-item>
        <text:list-item>
          <text:p text:style-name="P56">You review → correct</text:p>
        </text:list-item>
      </text:list>
      <text:p text:style-name="Text_20_body"><text:soft-page-break/>That loop is powerful.</text:p>
      <text:p text:style-name="Horizontal_20_Line"/>
      <text:h text:style-name="Heading_20_2" text:outline-level="2">Keep it small (seriously)</text:h>
      <text:p text:style-name="Text_20_body">You only need:</text:p>
      <text:list text:style-name="L52">
        <text:list-item>
          <text:p text:style-name="P57">a few scripts</text:p>
        </text:list-item>
        <text:list-item>
          <text:p text:style-name="P57">a tiny DB</text:p>
        </text:list-item>
        <text:list-item>
          <text:p text:style-name="P57">some structured text</text:p>
        </text:list-item>
      </text:list>
      <text:p text:style-name="Text_20_body">Resist the urge to build:</text:p>
      <text:list text:style-name="L53">
        <text:list-item>
          <text:p text:style-name="P58">full pipelines</text:p>
        </text:list-item>
        <text:list-item>
          <text:p text:style-name="P58">frameworks</text:p>
        </text:list-item>
        <text:list-item>
          <text:p text:style-name="P58">dashboards</text:p>
        </text:list-item>
      </text:list>
      <text:p text:style-name="Text_20_body">Those come later, if ever.</text:p>
      <text:p text:style-name="Horizontal_20_Line"/>
      <text:h text:style-name="Heading_20_2" text:outline-level="2">A good “weekend-sized” milestone</text:h>
      <text:list text:style-name="L54">
        <text:list-item>
          <text:p text:style-name="P59">take 5–10 lore documents</text:p>
        </text:list-item>
        <text:list-item>
          <text:p text:style-name="P59">chunk them</text:p>
        </text:list-item>
        <text:list-item>
          <text:p text:style-name="P59">extract metadata with ChatGPT/Claude</text:p>
        </text:list-item>
        <text:list-item>
          <text:p text:style-name="P59">store in SQLite</text:p>
        </text:list-item>
        <text:list-item>
          <text:p text:style-name="P59">run 10 test questions manually</text:p>
        </text:list-item>
      </text:list>
      <text:p text:style-name="Text_20_body">If that works:</text:p>
      <text:p text:style-name="Quotations">you already have Version 0 of your system</text:p>
      <text:p text:style-name="Horizontal_20_Line"/>
      <text:h text:style-name="Heading_20_2" text:outline-level="2">Bottom line</text:h>
      <text:p text:style-name="Text_20_body">Yes—write some Python.</text:p>
      <text:p text:style-name="Text_20_body">Not to be clever, but to:</text:p>
      <text:p text:style-name="Quotations">make your data reliable, inspectable, and testable</text:p>
      <text:p text:style-name="Text_20_body">That’s where your background gives you a real edge over most people doing this kind of project.</text:p>
      <text:p text:style-name="Horizontal_20_Line"/>
      <text:p text:style-name="Text_20_body">And honestly, this is the fun part:<text:line-break/>small scripts, clean data, incremental insight… no hype required.</text:p>
      <text:p text:style-name="Text_20_body"><text:soft-page-break/>---</text:p>
      <text:p text:style-name="Text_20_body"/>
      <text:p text:style-name="Text_20_body">There is really little need to go beyond SQLite, right? I have plenty of good code models for using SQLAlchemy to work with SQLite, so if I ever decide to port to Postgres or whatever, not a big deal. </text:p>
      <text:p text:style-name="Text_20_body"/>
      <text:p text:style-name="Text_20_body">---</text:p>
      <text:p text:style-name="Text_20_body">Short answer: <text:span text:style-name="Strong_20_Emphasis">you’re absolutely fine with SQLite</text:span>—and for this project, it’s the <text:span text:style-name="Emphasis">right</text:span> choice.</text:p>
      <text:p text:style-name="Text_20_body">If you were designing this from scratch as a “serious system,” you might be tempted to overbuild. Don’t.</text:p>
      <text:p text:style-name="Horizontal_20_Line"/>
      <text:h text:style-name="Heading_20_1" text:outline-level="1">Why SQLite is exactly right here</text:h>
      <text:p text:style-name="Text_20_body">For your use case:</text:p>
      <text:list text:style-name="L55">
        <text:list-item>
          <text:p text:style-name="P60">single user</text:p>
        </text:list-item>
        <text:list-item>
          <text:p text:style-name="P60">local workflows</text:p>
        </text:list-item>
        <text:list-item>
          <text:p text:style-name="P60">modest dataset (even “large lore corpus” is tiny by DB standards)</text:p>
        </text:list-item>
        <text:list-item>
          <text:p text:style-name="P60">iterative, exploratory work</text:p>
        </text:list-item>
      </text:list>
      <text:p text:style-name="Text_20_body">SQLite gives you:</text:p>
      <text:list text:style-name="L56">
        <text:list-item>
          <text:p text:style-name="P61">zero setup</text:p>
        </text:list-item>
        <text:list-item>
          <text:p text:style-name="P61">fast enough performance</text:p>
        </text:list-item>
        <text:list-item>
          <text:p text:style-name="P61">full SQL power</text:p>
        </text:list-item>
        <text:list-item>
          <text:p text:style-name="P61">easy backups (it’s just a file)</text:p>
        </text:list-item>
        <text:list-item>
          <text:p text:style-name="P61">portability</text:p>
        </text:list-item>
      </text:list>
      <text:p text:style-name="Text_20_body">That last one matters more than people realize:</text:p>
      <text:p text:style-name="Quotations">you can copy your entire “world brain” with one file</text:p>
      <text:p text:style-name="Horizontal_20_Line"/>
      <text:h text:style-name="Heading_20_1" text:outline-level="1">When SQLite starts to creak (so you know the boundary)</text:h>
      <text:p text:style-name="Text_20_body">You’d only need to move beyond it if you hit something like:</text:p>
      <text:list text:style-name="L57">
        <text:list-item>
          <text:p text:style-name="P62">multiple concurrent users writing</text:p>
        </text:list-item>
        <text:list-item>
          <text:p text:style-name="P62"><text:soft-page-break/>very large-scale embeddings (millions of vectors)</text:p>
        </text:list-item>
        <text:list-item>
          <text:p text:style-name="P62">heavy parallel workloads</text:p>
        </text:list-item>
        <text:list-item>
          <text:p text:style-name="P62">need for a dedicated graph database</text:p>
        </text:list-item>
      </text:list>
      <text:p text:style-name="Text_20_body">You are nowhere near that.</text:p>
      <text:p text:style-name="Horizontal_20_Line"/>
      <text:h text:style-name="Heading_20_1" text:outline-level="1">SQLAlchemy: good call</text:h>
      <text:p text:style-name="Text_20_body">Using SQLAlchemy buys you:</text:p>
      <text:list text:style-name="L58">
        <text:list-item>
          <text:p text:style-name="P63">portability (SQLite → Postgres later if needed)</text:p>
        </text:list-item>
        <text:list-item>
          <text:p text:style-name="P63">cleaner schema evolution</text:p>
        </text:list-item>
        <text:list-item>
          <text:p text:style-name="P63">less raw SQL boilerplate</text:p>
        </text:list-item>
      </text:list>
      <text:p text:style-name="Text_20_body">But I’d keep it <text:span text:style-name="Strong_20_Emphasis">lightweight</text:span>:</text:p>
      <text:list text:style-name="L59">
        <text:list-item>
          <text:p text:style-name="P64">don’t build an elaborate ORM layer</text:p>
        </text:list-item>
        <text:list-item>
          <text:p text:style-name="P64">treat it as a thin abstraction</text:p>
        </text:list-item>
      </text:list>
      <text:p text:style-name="Horizontal_20_Line"/>
      <text:h text:style-name="Heading_20_1" text:outline-level="1">One optional upgrade to consider</text:h>
      <text:p text:style-name="Text_20_body">If you want slightly more analytical power:</text:p>
      <text:h text:style-name="Heading_20_3" text:outline-level="3">DuckDB</text:h>
      <text:p text:style-name="Text_20_body">It’s similar to SQLite but better for:</text:p>
      <text:list text:style-name="L60">
        <text:list-item>
          <text:p text:style-name="P65">analytics</text:p>
        </text:list-item>
        <text:list-item>
          <text:p text:style-name="P65">columnar queries</text:p>
        </text:list-item>
        <text:list-item>
          <text:p text:style-name="P65">working with larger datasets</text:p>
        </text:list-item>
      </text:list>
      <text:p text:style-name="Text_20_body">That said:</text:p>
      <text:p text:style-name="Quotations">SQLite is simpler and perfectly sufficient</text:p>
      <text:p text:style-name="Text_20_body">I wouldn’t switch unless you feel a specific limitation.</text:p>
      <text:p text:style-name="Horizontal_20_Line"/>
      <text:h text:style-name="Heading_20_1" text:outline-level="1">What about vector search?</text:h>
      <text:p text:style-name="Text_20_body">This is the only area where people think they need something else.</text:p>
      <text:p text:style-name="Text_20_body">Reality:</text:p>
      <text:p text:style-name="Text_20_body">You can stay in SQLite and still do this:</text:p>
      <text:list text:style-name="L61">
        <text:list-item>
          <text:p text:style-name="P66"><text:soft-page-break/>store embeddings as blobs or arrays</text:p>
        </text:list-item>
        <text:list-item>
          <text:p text:style-name="P66">use extensions like:</text:p>
          <text:list>
            <text:list-item>
              <text:p text:style-name="P66"><text:span text:style-name="Source_20_Text">sqlite-vss</text:span></text:p>
            </text:list-item>
            <text:list-item>
              <text:p text:style-name="P66">or simple cosine similarity in Python</text:p>
            </text:list-item>
          </text:list>
        </text:list-item>
      </text:list>
      <text:p text:style-name="Text_20_body">For your scale:</text:p>
      <text:p text:style-name="Quotations">Python + SQLite is more than enough</text:p>
      <text:p text:style-name="Text_20_body">No need for Pinecone/Weaviate/etc.</text:p>
      <text:p text:style-name="Horizontal_20_Line"/>
      <text:h text:style-name="Heading_20_1" text:outline-level="1">What about graph databases?</text:h>
      <text:p text:style-name="Text_20_body">Tempting, but premature.</text:p>
      <text:p text:style-name="Text_20_body">You can model relationships in SQLite just fine:</text:p>
      <text:list text:style-name="L62">
        <text:list-item>
          <text:p text:style-name="P67"><text:span text:style-name="Source_20_Text">entities</text:span></text:p>
        </text:list-item>
        <text:list-item>
          <text:p text:style-name="P67"><text:span text:style-name="Source_20_Text">relationships</text:span> table</text:p>
        </text:list-item>
        <text:list-item>
          <text:p text:style-name="P67">joins</text:p>
        </text:list-item>
      </text:list>
      <text:p text:style-name="Text_20_body">Example:</text:p>
      <text:p text:style-name="Preformatted_20_Text"><text:span text:style-name="Source_20_Text">relationships(</text:span></text:p>
      <text:p text:style-name="Preformatted_20_Text"><text:span text:style-name="Source_20_Text"><text:s text:c="2"/>source_id,</text:span></text:p>
      <text:p text:style-name="Preformatted_20_Text"><text:span text:style-name="Source_20_Text"><text:s text:c="2"/>target_id,</text:span></text:p>
      <text:p text:style-name="Preformatted_20_Text"><text:span text:style-name="Source_20_Text"><text:s text:c="2"/>relationship_type</text:span></text:p>
      <text:p text:style-name="P1"><text:span text:style-name="Source_20_Text">)</text:span></text:p>
      <text:p text:style-name="Text_20_body">That gets you 80–90% of graph usefulness.</text:p>
      <text:p text:style-name="Text_20_body">Only consider Neo4j/etc. if:</text:p>
      <text:list text:style-name="L63">
        <text:list-item>
          <text:p text:style-name="P68">you <text:span text:style-name="Emphasis">really</text:span> need complex traversal queries</text:p>
        </text:list-item>
        <text:list-item>
          <text:p text:style-name="P68">and you feel pain doing them in SQL</text:p>
        </text:list-item>
      </text:list>
      <text:p text:style-name="Horizontal_20_Line"/>
      <text:h text:style-name="Heading_20_1" text:outline-level="1">A practical architecture (clean and durable)</text:h>
      <text:list text:style-name="L64">
        <text:list-item>
          <text:p text:style-name="P69"><text:span text:style-name="Strong_20_Emphasis">Markdown/text files</text:span> → source of truth</text:p>
        </text:list-item>
        <text:list-item>
          <text:p text:style-name="P69"><text:span text:style-name="Strong_20_Emphasis">SQLite DB</text:span> → indexed, structured view</text:p>
        </text:list-item>
        <text:list-item>
          <text:p text:style-name="P69"><text:span text:style-name="Strong_20_Emphasis">Python scripts</text:span> → ingestion, validation, analysis</text:p>
        </text:list-item>
        <text:list-item>
          <text:p text:style-name="P69"><text:span text:style-name="Strong_20_Emphasis">LLMs</text:span> → extraction + interpretation</text:p>
        </text:list-item>
      </text:list>
      <text:p text:style-name="Text_20_body">That’s it.</text:p>
      <text:p text:style-name="Text_20_body">No services. No infra. No cloud.</text:p>
      <text:p text:style-name="Horizontal_20_Line"><text:soft-page-break/></text:p>
      <text:h text:style-name="Heading_20_1" text:outline-level="1">The real advantage of staying simple</text:h>
      <text:p text:style-name="Text_20_body">You get:</text:p>
      <text:list text:style-name="L65">
        <text:list-item>
          <text:p text:style-name="P70">fast iteration</text:p>
        </text:list-item>
        <text:list-item>
          <text:p text:style-name="P70">no operational overhead</text:p>
        </text:list-item>
        <text:list-item>
          <text:p text:style-name="P70">easy refactoring</text:p>
        </text:list-item>
        <text:list-item>
          <text:p text:style-name="P70">low cognitive load</text:p>
        </text:list-item>
      </text:list>
      <text:p text:style-name="Text_20_body">Which matters because:</text:p>
      <text:p text:style-name="Quotations">your real project is the book</text:p>
      <text:p text:style-name="Horizontal_20_Line"/>
      <text:h text:style-name="Heading_20_1" text:outline-level="1">Bottom line</text:h>
      <text:p text:style-name="Text_20_body">You’re making the right call:</text:p>
      <text:p text:style-name="Quotations">SQLite + SQLAlchemy = durable, flexible, zero-friction foundation</text:p>
      <text:p text:style-name="Text_20_body">You can always scale up later—but odds are, you won’t need to.</text:p>
      <text:p text:style-name="Horizontal_20_Line"/>
      <text:p text:style-name="Text_20_body">If you want next, I can sketch a <text:span text:style-name="Strong_20_Emphasis">minimal SQLAlchemy schema</text:span> that matches everything we discussed (documents, chunks, entities, relationships, eval set) without turning into a monster.</text:p>
      <text:p text:style-name="Text_20_body"/>
      <text:p text:style-name="Text_20_body">----</text:p>
      <text:p text:style-name="Text_20_body"/>
      <text:p text:style-name="Text_20_body">I have looked at DuckDB a few times but was leery about adding new tools if I did not really need them. <text:s/>Having said that, I do get the advantages of columnar queries for analytics. I have worked with every large scale DB under the Sun at one time or another, even (shudder....) Teradata. So I imagine I could handle it OK. LOL. <text:s/></text:p>
      <text:p text:style-name="Text_20_body"/>
      <text:p text:style-name="Text_20_body">---</text:p>
      <text:p text:style-name="Text_20_body"/>
      <text:p text:style-name="Text_20_body">Your instinct is right: <text:span text:style-name="Strong_20_Emphasis">don’t add DuckDB yet</text:span>. You don’t <text:span text:style-name="Emphasis">need</text:span> it to get real progress.</text:p>
      <text:p text:style-name="Text_20_body">Given your background, you already know the pattern:</text:p>
      <text:p text:style-name="Quotations">the tool should follow the workload, not the other way around</text:p>
      <text:p text:style-name="Text_20_body">Right now your workload is:</text:p>
      <text:list text:style-name="L66">
        <text:list-item>
          <text:p text:style-name="P71"><text:soft-page-break/>small-to-medium corpus</text:p>
        </text:list-item>
        <text:list-item>
          <text:p text:style-name="P71">iterative schema changes</text:p>
        </text:list-item>
        <text:list-item>
          <text:p text:style-name="P71">lots of reads, occasional writes</text:p>
        </text:list-item>
        <text:list-item>
          <text:p text:style-name="P71">some light analysis</text:p>
        </text:list-item>
      </text:list>
      <text:p text:style-name="Text_20_body">That is <text:span text:style-name="Strong_20_Emphasis">SQLite territory all day long</text:span>.</text:p>
      <text:p text:style-name="Horizontal_20_Line"/>
      <text:h text:style-name="Heading_20_2" text:outline-level="2">Where DuckDB <text:span text:style-name="Emphasis">actually</text:span> earns its keep (so you know when to switch)</text:h>
      <text:p text:style-name="Text_20_body">DuckDB shines when you start doing things like:</text:p>
      <text:list text:style-name="L67">
        <text:list-item>
          <text:p text:style-name="P72">wide scans over lots of rows (“show me all chunks with X across everything”)</text:p>
        </text:list-item>
        <text:list-item>
          <text:p text:style-name="P72">aggregations over many dimensions (era × faction × region × time)</text:p>
        </text:list-item>
        <text:list-item>
          <text:p text:style-name="P72">ad-hoc analytical queries</text:p>
        </text:list-item>
        <text:list-item>
          <text:p text:style-name="P72">joining lots of semi-structured data</text:p>
        </text:list-item>
        <text:list-item>
          <text:p text:style-name="P72">working with Parquet/Arrow datasets</text:p>
        </text:list-item>
      </text:list>
      <text:p text:style-name="Text_20_body">In your project, that corresponds to a later phase like:</text:p>
      <text:p text:style-name="Quotations">“What patterns exist across the entire Saskan corpus?”</text:p>
      <text:p text:style-name="Text_20_body">Examples:</text:p>
      <text:list text:style-name="L68">
        <text:list-item>
          <text:p text:style-name="P73">which factions co-occur most often across eras</text:p>
        </text:list-item>
        <text:list-item>
          <text:p text:style-name="P73">which regions are underrepresented in narrative coverage</text:p>
        </text:list-item>
        <text:list-item>
          <text:p text:style-name="P73">clustering themes across documents</text:p>
        </text:list-item>
        <text:list-item>
          <text:p text:style-name="P73">frequency shifts over timeline</text:p>
        </text:list-item>
      </text:list>
      <text:p text:style-name="Text_20_body">That’s where columnar execution helps.</text:p>
      <text:p text:style-name="Horizontal_20_Line"/>
      <text:h text:style-name="Heading_20_2" text:outline-level="2">What I would do (pragmatic path)</text:h>
      <text:h text:style-name="Heading_20_3" text:outline-level="3">Phase 1 (now)</text:h>
      <text:list text:style-name="L69">
        <text:list-item>
          <text:p text:style-name="P74">SQLite only</text:p>
        </text:list-item>
        <text:list-item>
          <text:p text:style-name="P74">SQLAlchemy if you like</text:p>
        </text:list-item>
        <text:list-item>
          <text:p text:style-name="P74">focus on:</text:p>
          <text:list>
            <text:list-item>
              <text:p text:style-name="P74">ingestion</text:p>
            </text:list-item>
            <text:list-item>
              <text:p text:style-name="P74">chunking</text:p>
            </text:list-item>
            <text:list-item>
              <text:p text:style-name="P74"><text:soft-page-break/>retrieval</text:p>
            </text:list-item>
            <text:list-item>
              <text:p text:style-name="P74">evaluation</text:p>
            </text:list-item>
          </text:list>
        </text:list-item>
      </text:list>
      <text:p text:style-name="Text_20_body">No DuckDB.</text:p>
      <text:p text:style-name="Horizontal_20_Line"/>
      <text:h text:style-name="Heading_20_3" text:outline-level="3">Phase 2 (when curiosity kicks in)</text:h>
      <text:p text:style-name="Text_20_body">When you <text:span text:style-name="Emphasis">feel</text:span> like doing analysis, don’t migrate—just <text:span text:style-name="Strong_20_Emphasis">add DuckDB alongside</text:span>.</text:p>
      <text:p text:style-name="Text_20_body">Example pattern:</text:p>
      <text:list text:style-name="L70">
        <text:list-item>
          <text:p text:style-name="P75">SQLite → operational store</text:p>
        </text:list-item>
        <text:list-item>
          <text:p text:style-name="P75">DuckDB → read-only analytical layer</text:p>
        </text:list-item>
      </text:list>
      <text:p text:style-name="Text_20_body">You can literally:</text:p>
      <text:p text:style-name="Preformatted_20_Text"><text:span text:style-name="Source_20_Text">import duckdb</text:span></text:p>
      <text:p text:style-name="Preformatted_20_Text"><text:span text:style-name="Source_20_Text">con = duckdb.connect()</text:span></text:p>
      <text:p text:style-name="Preformatted_20_Text"/>
      <text:p text:style-name="Preformatted_20_Text"><text:span text:style-name="Source_20_Text">con.execute("""</text:span></text:p>
      <text:p text:style-name="Preformatted_20_Text"><text:span text:style-name="Source_20_Text"><text:s text:c="4"/>SELECT region, COUNT(*)</text:span></text:p>
      <text:p text:style-name="Preformatted_20_Text"><text:span text:style-name="Source_20_Text"><text:s text:c="4"/>FROM sqlite_scan('lore.db', 'chunks')</text:span></text:p>
      <text:p text:style-name="Preformatted_20_Text"><text:span text:style-name="Source_20_Text"><text:s text:c="4"/>GROUP BY region</text:span></text:p>
      <text:p text:style-name="P1"><text:span text:style-name="Source_20_Text">""")</text:span></text:p>
      <text:p text:style-name="Text_20_body">DuckDB can query SQLite directly. No migration needed.</text:p>
      <text:p text:style-name="Horizontal_20_Line"/>
      <text:h text:style-name="Heading_20_2" text:outline-level="2">Why this hybrid approach works</text:h>
      <text:list text:style-name="L71">
        <text:list-item>
          <text:p text:style-name="P76">SQLite stays your <text:span text:style-name="Strong_20_Emphasis">system of record</text:span></text:p>
        </text:list-item>
        <text:list-item>
          <text:p text:style-name="P76">DuckDB becomes your <text:span text:style-name="Strong_20_Emphasis">lab bench</text:span></text:p>
        </text:list-item>
      </text:list>
      <text:p text:style-name="Text_20_body">You avoid:</text:p>
      <text:list text:style-name="L72">
        <text:list-item>
          <text:p text:style-name="P77">schema churn headaches</text:p>
        </text:list-item>
        <text:list-item>
          <text:p text:style-name="P77">premature optimization</text:p>
        </text:list-item>
        <text:list-item>
          <text:p text:style-name="P77">rewriting code</text:p>
        </text:list-item>
      </text:list>
      <text:p text:style-name="Text_20_body">And you get:</text:p>
      <text:list text:style-name="L73">
        <text:list-item>
          <text:p text:style-name="P78">fast analytics when you want it</text:p>
        </text:list-item>
      </text:list>
      <text:p text:style-name="Horizontal_20_Line"/>
      <text:h text:style-name="Heading_20_2" text:outline-level="2">About your Teradata flashback 😄</text:h>
      <text:p text:style-name="Text_20_body">What you’re building here is basically:</text:p>
      <text:p text:style-name="Quotations">a tiny, humane, single-user data warehouse for a fictional world</text:p>
      <text:p text:style-name="Text_20_body">So yes, your instincts from that world apply—but scaled down:</text:p>
      <text:list text:style-name="L74">
        <text:list-item>
          <text:p text:style-name="P79"><text:soft-page-break/>clean schema</text:p>
        </text:list-item>
        <text:list-item>
          <text:p text:style-name="P79">controlled ingestion</text:p>
        </text:list-item>
        <text:list-item>
          <text:p text:style-name="P79">testable queries</text:p>
        </text:list-item>
        <text:list-item>
          <text:p text:style-name="P79">no overengineering</text:p>
        </text:list-item>
      </text:list>
      <text:p text:style-name="Text_20_body">And thankfully:</text:p>
      <text:list text:style-name="L75">
        <text:list-item>
          <text:p text:style-name="P80">no query planners from hell</text:p>
        </text:list-item>
        <text:list-item>
          <text:p text:style-name="P80">no spool space errors</text:p>
        </text:list-item>
        <text:list-item>
          <text:p text:style-name="P80">no midnight pager duty</text:p>
        </text:list-item>
      </text:list>
      <text:p text:style-name="Horizontal_20_Line"/>
      <text:h text:style-name="Heading_20_2" text:outline-level="2">A simple rule of thumb</text:h>
      <text:p text:style-name="Text_20_body">Stay with SQLite until you hit one of these thoughts:</text:p>
      <text:list text:style-name="L76">
        <text:list-item>
          <text:p text:style-name="P81">“This query feels slow because I’m scanning everything”</text:p>
        </text:list-item>
        <text:list-item>
          <text:p text:style-name="P81">“I want to slice this 12 different ways quickly”</text:p>
        </text:list-item>
        <text:list-item>
          <text:p text:style-name="P81">“I’m exporting to pandas just to do analysis”</text:p>
        </text:list-item>
      </text:list>
      <text:p text:style-name="Text_20_body">At that point:</text:p>
      <text:p text:style-name="Quotations">add DuckDB, don’t replace SQLite</text:p>
      <text:p text:style-name="Horizontal_20_Line"/>
      <text:h text:style-name="Heading_20_2" text:outline-level="2">Bottom line</text:h>
      <text:p text:style-name="Text_20_body">You’re thinking about this exactly right:</text:p>
      <text:list text:style-name="L77">
        <text:list-item>
          <text:p text:style-name="P82">resist new tools unless needed</text:p>
        </text:list-item>
        <text:list-item>
          <text:p text:style-name="P82">understand where they fit</text:p>
        </text:list-item>
        <text:list-item>
          <text:p text:style-name="P82">add them surgically</text:p>
        </text:list-item>
      </text:list>
      <text:p text:style-name="Text_20_body">For now:</text:p>
      <text:p text:style-name="Quotations">SQLite = foundation<text:line-break/>DuckDB = optional future microscope</text:p>
      <text:p text:style-name="Horizontal_20_Line"/>
      <text:p text:style-name="Text_20_body">If you want later, I can show a <text:span text:style-name="Strong_20_Emphasis">very small example of using DuckDB to analyze your lore (co-occurrence, timeline density, etc.)</text:span> without changing your core system.</text:p>
      <text:p text:style-name="Text_20_body"/>
      <text:p text:style-name="Text_20_body">---</text:p>
      <text:p text:style-name="Text_20_body"/>
      <text:p text:style-name="Text_20_body"><text:soft-page-break/>I read through your design notes carefully. Short version: you’re on exactly the right track, and—more importantly—you’re not fooling yourself about scope. That’s 90% of success here.</text:p>
      <text:p text:style-name="Text_20_body">I’ll give you three things:</text:p>
      <text:list text:style-name="L78">
        <text:list-item>
          <text:p text:style-name="P83"><text:span text:style-name="Strong_20_Emphasis">Clarifying questions (few, but important)</text:span></text:p>
        </text:list-item>
        <text:list-item>
          <text:p text:style-name="P83"><text:span text:style-name="Strong_20_Emphasis">Concrete suggestions / corrections before you start</text:span></text:p>
        </text:list-item>
        <text:list-item>
          <text:p text:style-name="P83"><text:span text:style-name="Strong_20_Emphasis">A tight “pre-pilot MVP” plan with ADRs + schema direction</text:span></text:p>
        </text:list-item>
      </text:list>
      <text:p text:style-name="Horizontal_20_Line"/>
      <text:h text:style-name="Heading_20_1" text:outline-level="1">1) Clarifying questions (answer before coding)</text:h>
      <text:p text:style-name="Text_20_body">These are not academic—they affect your schema and extraction prompts.</text:p>
      <text:h text:style-name="Heading_20_3" text:outline-level="3">A. What is your unit of “truth”?</text:h>
      <text:p text:style-name="Text_20_body">Right now you mix:</text:p>
      <text:list text:style-name="L79">
        <text:list-item>
          <text:p text:style-name="P84">documents (stories, lore)</text:p>
        </text:list-item>
        <text:list-item>
          <text:p text:style-name="P84">claims (facts)</text:p>
        </text:list-item>
        <text:list-item>
          <text:p text:style-name="P84">beliefs (in-world perspective)</text:p>
        </text:list-item>
      </text:list>
      <text:p text:style-name="Text_20_body">You <text:span text:style-name="Emphasis">hint</text:span> at this with:</text:p>
      <text:list text:style-name="L80">
        <text:list-item>
          <text:p text:style-name="P85"><text:span text:style-name="Source_20_Text">canon_level</text:span></text:p>
        </text:list-item>
        <text:list-item>
          <text:p text:style-name="P85"><text:span text:style-name="Source_20_Text">truth_status</text:span></text:p>
        </text:list-item>
        <text:list-item>
          <text:p text:style-name="P85"><text:span text:style-name="Source_20_Text">claims</text:span> with source spans</text:p>
        </text:list-item>
      </text:list>
      <text:p text:style-name="Text_20_body">👉 Question:<text:line-break/>Do you want the system to distinguish:</text:p>
      <text:list text:style-name="L81">
        <text:list-item>
          <text:p text:style-name="P86"><text:span text:style-name="Strong_20_Emphasis">objective canon truth</text:span></text:p>
        </text:list-item>
        <text:list-item>
          <text:p text:style-name="P86"><text:span text:style-name="Strong_20_Emphasis">in-world belief</text:span></text:p>
        </text:list-item>
        <text:list-item>
          <text:p text:style-name="P86"><text:span text:style-name="Strong_20_Emphasis">rumor / unreliable narration</text:span></text:p>
        </text:list-item>
      </text:list>
      <text:p text:style-name="Text_20_body">If yes (and I strongly recommend yes), this affects schema immediately.</text:p>
      <text:p text:style-name="Horizontal_20_Line"/>
      <text:h text:style-name="Heading_20_3" text:outline-level="3">B. Time model: vague or strict?</text:h>
      <text:p text:style-name="Text_20_body">Your world has:</text:p>
      <text:list text:style-name="L82">
        <text:list-item>
          <text:p text:style-name="P87">historical arcs</text:p>
        </text:list-item>
        <text:list-item>
          <text:p text:style-name="P87">events</text:p>
        </text:list-item>
        <text:list-item>
          <text:p text:style-name="P87">eras</text:p>
        </text:list-item>
        <text:list-item>
          <text:p text:style-name="P87">possibly conflicting timelines</text:p>
        </text:list-item>
      </text:list>
      <text:p text:style-name="Text_20_body"><text:soft-page-break/>👉 Question:<text:line-break/>Do you want:</text:p>
      <text:list text:style-name="L83">
        <text:list-item>
          <text:p text:style-name="P88">simple: <text:span text:style-name="Source_20_Text">era = "Famine Period"</text:span></text:p>
        </text:list-item>
        <text:list-item>
          <text:p text:style-name="P88">or structured: <text:span text:style-name="Source_20_Text">(start_year, end_year, relative ordering, uncertainty)</text:span></text:p>
        </text:list-item>
      </text:list>
      <text:p text:style-name="Text_20_body">For MVP: keep it simple—but don’t paint yourself into a corner.</text:p>
      <text:p text:style-name="Horizontal_20_Line"/>
      <text:h text:style-name="Heading_20_3" text:outline-level="3">C. Entity identity vs naming</text:h>
      <text:p text:style-name="Text_20_body">You already know this will bite you:</text:p>
      <text:list text:style-name="L84">
        <text:list-item>
          <text:p text:style-name="P89">Fatune / Fatunik</text:p>
        </text:list-item>
        <text:list-item>
          <text:p text:style-name="P89">Night Hall / NightHall</text:p>
        </text:list-item>
      </text:list>
      <text:p text:style-name="Text_20_body">👉 Question:<text:line-break/>Do you want:</text:p>
      <text:list text:style-name="L85">
        <text:list-item>
          <text:p text:style-name="P90">canonical entity table with aliases</text:p>
        </text:list-item>
        <text:list-item>
          <text:p text:style-name="P90">or just text tagging for now?</text:p>
        </text:list-item>
      </text:list>
      <text:p text:style-name="Text_20_body">My recommendation: <text:span text:style-name="Strong_20_Emphasis">add canonical entity IDs from day 1</text:span>, even if crude.</text:p>
      <text:p text:style-name="Horizontal_20_Line"/>
      <text:h text:style-name="Heading_20_3" text:outline-level="3">D. What counts as success for MVP?</text:h>
      <text:p text:style-name="Text_20_body">Be explicit. Something like:</text:p>
      <text:p text:style-name="Quotations">“Given 20–30 lore entries about Covenant of Varkaar, system answers 10 questions correctly using retrieval.”</text:p>
      <text:p text:style-name="Text_20_body">If you don’t define this, you’ll drift.</text:p>
      <text:p text:style-name="Horizontal_20_Line"/>
      <text:h text:style-name="Heading_20_1" text:outline-level="1">2) Key suggestions (this is where I push you a bit)</text:h>
      <text:h text:style-name="Heading_20_2" text:outline-level="2">2.1 You are slightly over-ambitious on metadata (tighten it)</text:h>
      <text:p text:style-name="Text_20_body">Your schema example is good, but too rich for MVP:</text:p>
      <text:p text:style-name="Preformatted_20_Text"><text:span text:style-name="Source_20_Text">{</text:span></text:p>
      <text:p text:style-name="Preformatted_20_Text"><text:span text:style-name="Source_20_Text"><text:s/>"title": "",</text:span></text:p>
      <text:p text:style-name="Preformatted_20_Text"><text:span text:style-name="Source_20_Text"><text:s/>"summary": "",</text:span></text:p>
      <text:p text:style-name="Preformatted_20_Text"><text:span text:style-name="Source_20_Text"><text:s/>"region": [],</text:span></text:p>
      <text:p text:style-name="Preformatted_20_Text"><text:span text:style-name="Source_20_Text"><text:s/>"places": [],</text:span></text:p>
      <text:p text:style-name="Preformatted_20_Text"><text:span text:style-name="Source_20_Text"><text:s/>"characters": [],</text:span></text:p>
      <text:p text:style-name="Preformatted_20_Text"><text:span text:style-name="Source_20_Text"><text:s/>"factions": [],</text:span></text:p>
      <text:p text:style-name="Preformatted_20_Text"><text:soft-page-break/><text:span text:style-name="Source_20_Text"><text:s/>"era": "",</text:span></text:p>
      <text:p text:style-name="Preformatted_20_Text"><text:span text:style-name="Source_20_Text"><text:s/>"canon_level": "",</text:span></text:p>
      <text:p text:style-name="Preformatted_20_Text"><text:span text:style-name="Source_20_Text"><text:s/>"truth_status": "",</text:span></text:p>
      <text:p text:style-name="Preformatted_20_Text"><text:span text:style-name="Source_20_Text"><text:s/>"key_events": [],</text:span></text:p>
      <text:p text:style-name="Preformatted_20_Text"><text:span text:style-name="Source_20_Text"><text:s/>"claims": [...]</text:span></text:p>
      <text:p text:style-name="P1"><text:span text:style-name="Source_20_Text">}</text:span></text:p>
      <text:p text:style-name="Text_20_body">Problem:</text:p>
      <text:list text:style-name="L86">
        <text:list-item>
          <text:p text:style-name="P91">extraction will be noisy</text:p>
        </text:list-item>
        <text:list-item>
          <text:p text:style-name="P91">review burden high</text:p>
        </text:list-item>
        <text:list-item>
          <text:p text:style-name="P91">slows you down</text:p>
        </text:list-item>
      </text:list>
      <text:p text:style-name="Text_20_body">👉 Trim to MVP core:</text:p>
      <text:p text:style-name="Text_20_body"><text:span text:style-name="Strong_20_Emphasis">Keep only:</text:span></text:p>
      <text:list text:style-name="L87">
        <text:list-item>
          <text:p text:style-name="P92">title</text:p>
        </text:list-item>
        <text:list-item>
          <text:p text:style-name="P92">summary</text:p>
        </text:list-item>
        <text:list-item>
          <text:p text:style-name="P92">entities (unified, not split yet)</text:p>
        </text:list-item>
        <text:list-item>
          <text:p text:style-name="P92">era (string)</text:p>
        </text:list-item>
        <text:list-item>
          <text:p text:style-name="P92">claims (with source_span)</text:p>
        </text:list-item>
      </text:list>
      <text:p text:style-name="Text_20_body">Add others later.</text:p>
      <text:p text:style-name="Horizontal_20_Line"/>
      <text:h text:style-name="Heading_20_2" text:outline-level="2">2.2 Claims are the most important thing you’ve got</text:h>
      <text:p text:style-name="Text_20_body">This is the best idea in your whole document:</text:p>
      <text:p text:style-name="Quotations">“claims with source spans”</text:p>
      <text:p text:style-name="Text_20_body">That is your <text:span text:style-name="Strong_20_Emphasis">ground truth anchor</text:span>.</text:p>
      <text:p text:style-name="Text_20_body">If you do nothing else right—do this right.</text:p>
      <text:p text:style-name="Text_20_body">Recommendation:</text:p>
      <text:p text:style-name="Text_20_body">Each claim should be:</text:p>
      <text:list text:style-name="L88">
        <text:list-item>
          <text:p text:style-name="P93">atomic</text:p>
        </text:list-item>
        <text:list-item>
          <text:p text:style-name="P93">attributable</text:p>
        </text:list-item>
        <text:list-item>
          <text:p text:style-name="P93">typed (optional later)</text:p>
        </text:list-item>
      </text:list>
      <text:p text:style-name="Text_20_body">Example:</text:p>
      <text:p text:style-name="Preformatted_20_Text"><text:span text:style-name="Source_20_Text">statement: "The Covenant of Varkaar was formed after the Third Collapse"</text:span></text:p>
      <text:p text:style-name="Preformatted_20_Text"><text:span text:style-name="Source_20_Text">source_span: "..."</text:span></text:p>
      <text:p text:style-name="P1"><text:span text:style-name="Source_20_Text">confidence: 0.9</text:span></text:p>
      <text:p text:style-name="Text_20_body">Later you can classify:</text:p>
      <text:list text:style-name="L89">
        <text:list-item>
          <text:p text:style-name="P94"><text:soft-page-break/>event</text:p>
        </text:list-item>
        <text:list-item>
          <text:p text:style-name="P94">relationship</text:p>
        </text:list-item>
        <text:list-item>
          <text:p text:style-name="P94">belief</text:p>
        </text:list-item>
        <text:list-item>
          <text:p text:style-name="P94">causal claim</text:p>
        </text:list-item>
      </text:list>
      <text:p text:style-name="Horizontal_20_Line"/>
      <text:h text:style-name="Heading_20_2" text:outline-level="2">2.3 Retrieval first — but make it <text:span text:style-name="Emphasis">traceable</text:span></text:h>
      <text:p text:style-name="Text_20_body">You correctly emphasize RAG first</text:p>
      <text:p text:style-name="Text_20_body">But add one rule:</text:p>
      <text:p text:style-name="Text_20_body">👉 Every answer must return:</text:p>
      <text:list text:style-name="L90">
        <text:list-item>
          <text:p text:style-name="P95">supporting chunks</text:p>
        </text:list-item>
        <text:list-item>
          <text:p text:style-name="P95">or supporting claims</text:p>
        </text:list-item>
      </text:list>
      <text:p text:style-name="Text_20_body">Otherwise you can’t debug anything.</text:p>
      <text:p text:style-name="Horizontal_20_Line"/>
      <text:h text:style-name="Heading_20_2" text:outline-level="2">2.4 SQLite is correct — but model relationships early</text:h>
      <text:p text:style-name="Text_20_body">You noted:</text:p>
      <text:p text:style-name="Quotations">“relationships table”</text:p>
      <text:p text:style-name="Text_20_body">Do it now, not later.</text:p>
      <text:p text:style-name="Text_20_body">Even if you barely use it.</text:p>
      <text:p text:style-name="Text_20_body">Because retrofitting relationships later = pain.</text:p>
      <text:p text:style-name="Horizontal_20_Line"/>
      <text:h text:style-name="Heading_20_2" text:outline-level="2">2.5 Your real system is not the model (you already get this)</text:h>
      <text:p text:style-name="Text_20_body">This line in your notes is dead right:</text:p>
      <text:p text:style-name="Quotations">“models are components in a system”</text:p>
      <text:p text:style-name="Text_20_body">So design:</text:p>
      <text:list text:style-name="L91">
        <text:list-item>
          <text:p text:style-name="P96">data → primary</text:p>
        </text:list-item>
        <text:list-item>
          <text:p text:style-name="P96">model → replaceable</text:p>
        </text:list-item>
      </text:list>
      <text:p text:style-name="Horizontal_20_Line"/>
      <text:h text:style-name="Heading_20_1" text:outline-level="1">3) Pre-Pilot MVP Plan (tight, executable)</text:h>
      <text:p text:style-name="Text_20_body">This is what I would lock in before writing code.</text:p>
      <text:p text:style-name="Horizontal_20_Line"><text:soft-page-break/></text:p>
      <text:h text:style-name="Heading_20_1" text:outline-level="1">ADRs (keep them short and explicit)</text:h>
      <text:h text:style-name="Heading_20_3" text:outline-level="3">ADR-001: No training initially</text:h>
      <text:list text:style-name="L92">
        <text:list-item>
          <text:p text:style-name="P97">Use small local instruct model</text:p>
        </text:list-item>
        <text:list-item>
          <text:p text:style-name="P97">No fine-tuning until evaluation proves need</text:p>
        </text:list-item>
      </text:list>
      <text:p text:style-name="Horizontal_20_Line"/>
      <text:h text:style-name="Heading_20_3" text:outline-level="3">ADR-002: SQLite as system of record</text:h>
      <text:list text:style-name="L93">
        <text:list-item>
          <text:p text:style-name="P98">Single DB file</text:p>
        </text:list-item>
        <text:list-item>
          <text:p text:style-name="P98">SQLAlchemy thin layer</text:p>
        </text:list-item>
        <text:list-item>
          <text:p text:style-name="P98">No external services</text:p>
        </text:list-item>
      </text:list>
      <text:p text:style-name="Horizontal_20_Line"/>
      <text:h text:style-name="Heading_20_3" text:outline-level="3">ADR-003: Claims are first-class objects</text:h>
      <text:list text:style-name="L94">
        <text:list-item>
          <text:p text:style-name="P99">All extracted knowledge stored as claims</text:p>
        </text:list-item>
        <text:list-item>
          <text:p text:style-name="P99">Every claim must include source_span</text:p>
        </text:list-item>
      </text:list>
      <text:p text:style-name="Horizontal_20_Line"/>
      <text:h text:style-name="Heading_20_3" text:outline-level="3">ADR-004: Retrieval over chunks + claims</text:h>
      <text:list text:style-name="L95">
        <text:list-item>
          <text:p text:style-name="P100">Primary answering method = retrieval</text:p>
        </text:list-item>
        <text:list-item>
          <text:p text:style-name="P100">Model only composes answer</text:p>
        </text:list-item>
      </text:list>
      <text:p text:style-name="Horizontal_20_Line"/>
      <text:h text:style-name="Heading_20_3" text:outline-level="3">ADR-005: Human-in-the-loop validation required</text:h>
      <text:list text:style-name="L96">
        <text:list-item>
          <text:p text:style-name="P101">No auto-ingestion without review</text:p>
        </text:list-item>
        <text:list-item>
          <text:p text:style-name="P101">Especially for claims</text:p>
        </text:list-item>
      </text:list>
      <text:p text:style-name="Horizontal_20_Line"/>
      <text:h text:style-name="Heading_20_3" text:outline-level="3">ADR-006: Scope limited to ONE domain</text:h>
      <text:list text:style-name="L97">
        <text:list-item>
          <text:p text:style-name="P102">Covenant of Varkaar only</text:p>
        </text:list-item>
        <text:list-item>
          <text:p text:style-name="P102">No expansion until MVP works</text:p>
        </text:list-item>
      </text:list>
      <text:p text:style-name="Horizontal_20_Line"/>
      <text:h text:style-name="Heading_20_1" text:outline-level="1">Minimal Schema (SQLite)</text:h>
      <text:p text:style-name="Text_20_body">This is lean but extensible.</text:p>
      <text:h text:style-name="Heading_20_2" text:outline-level="2"><text:soft-page-break/>documents</text:h>
      <text:p text:style-name="Preformatted_20_Text"><text:span text:style-name="Source_20_Text">id</text:span></text:p>
      <text:p text:style-name="Preformatted_20_Text"><text:span text:style-name="Source_20_Text">title</text:span></text:p>
      <text:p text:style-name="Preformatted_20_Text"><text:span text:style-name="Source_20_Text">source_text</text:span></text:p>
      <text:p text:style-name="P1"><text:span text:style-name="Source_20_Text">created_at</text:span></text:p>
      <text:h text:style-name="Heading_20_2" text:outline-level="2">chunks</text:h>
      <text:p text:style-name="Preformatted_20_Text"><text:span text:style-name="Source_20_Text">id</text:span></text:p>
      <text:p text:style-name="Preformatted_20_Text"><text:span text:style-name="Source_20_Text">document_id</text:span></text:p>
      <text:p text:style-name="Preformatted_20_Text"><text:span text:style-name="Source_20_Text">text</text:span></text:p>
      <text:p text:style-name="P1"><text:span text:style-name="Source_20_Text">chunk_index</text:span></text:p>
      <text:h text:style-name="Heading_20_2" text:outline-level="2">entities</text:h>
      <text:p text:style-name="Preformatted_20_Text"><text:span text:style-name="Source_20_Text">id</text:span></text:p>
      <text:p text:style-name="Preformatted_20_Text"><text:span text:style-name="Source_20_Text">name</text:span></text:p>
      <text:p text:style-name="P1"><text:span text:style-name="Source_20_Text">type <text:s text:c="2"/>-- (character, place, faction, etc.)</text:span></text:p>
      <text:h text:style-name="Heading_20_2" text:outline-level="2">entity_aliases (optional but useful early)</text:h>
      <text:p text:style-name="Preformatted_20_Text"><text:span text:style-name="Source_20_Text">id</text:span></text:p>
      <text:p text:style-name="Preformatted_20_Text"><text:span text:style-name="Source_20_Text">entity_id</text:span></text:p>
      <text:p text:style-name="P1"><text:span text:style-name="Source_20_Text">alias</text:span></text:p>
      <text:h text:style-name="Heading_20_2" text:outline-level="2">claims ← CORE TABLE</text:h>
      <text:p text:style-name="Preformatted_20_Text"><text:span text:style-name="Source_20_Text">id</text:span></text:p>
      <text:p text:style-name="Preformatted_20_Text"><text:span text:style-name="Source_20_Text">document_id</text:span></text:p>
      <text:p text:style-name="Preformatted_20_Text"><text:span text:style-name="Source_20_Text">chunk_id</text:span></text:p>
      <text:p text:style-name="Preformatted_20_Text"><text:span text:style-name="Source_20_Text">statement</text:span></text:p>
      <text:p text:style-name="Preformatted_20_Text"><text:span text:style-name="Source_20_Text">source_span</text:span></text:p>
      <text:p text:style-name="P1"><text:span text:style-name="Source_20_Text">confidence</text:span></text:p>
      <text:h text:style-name="Heading_20_2" text:outline-level="2">claim_entities (link table)</text:h>
      <text:p text:style-name="Preformatted_20_Text"><text:span text:style-name="Source_20_Text">claim_id</text:span></text:p>
      <text:p text:style-name="Preformatted_20_Text"><text:span text:style-name="Source_20_Text">entity_id</text:span></text:p>
      <text:p text:style-name="P1"><text:span text:style-name="Source_20_Text">role <text:s text:c="2"/>-- optional later</text:span></text:p>
      <text:h text:style-name="Heading_20_2" text:outline-level="2">eval_questions</text:h>
      <text:p text:style-name="Preformatted_20_Text"><text:span text:style-name="Source_20_Text">id</text:span></text:p>
      <text:p text:style-name="Preformatted_20_Text"><text:span text:style-name="Source_20_Text">question</text:span></text:p>
      <text:p text:style-name="P1"><text:span text:style-name="Source_20_Text">expected_answer</text:span></text:p>
      <text:h text:style-name="Heading_20_2" text:outline-level="2">eval_results</text:h>
      <text:p text:style-name="Preformatted_20_Text"><text:span text:style-name="Source_20_Text">id</text:span></text:p>
      <text:p text:style-name="Preformatted_20_Text"><text:span text:style-name="Source_20_Text">question_id</text:span></text:p>
      <text:p text:style-name="Preformatted_20_Text"><text:span text:style-name="Source_20_Text">model_answer</text:span></text:p>
      <text:p text:style-name="Preformatted_20_Text"><text:span text:style-name="Source_20_Text">passed</text:span></text:p>
      <text:p text:style-name="P1"><text:soft-page-break/><text:span text:style-name="Source_20_Text">notes</text:span></text:p>
      <text:p text:style-name="Text_20_body">That’s enough. Don’t add more yet.</text:p>
      <text:p text:style-name="Horizontal_20_Line"/>
      <text:h text:style-name="Heading_20_1" text:outline-level="1">Extraction Workflow (first real step)</text:h>
      <text:p text:style-name="Text_20_body">For <text:span text:style-name="Strong_20_Emphasis">Covenant of Varkaar</text:span>:</text:p>
      <text:h text:style-name="Heading_20_3" text:outline-level="3">Step 1</text:h>
      <text:p text:style-name="Text_20_body">Take ONE passage</text:p>
      <text:h text:style-name="Heading_20_3" text:outline-level="3">Step 2 (LLM prompt)</text:h>
      <text:p text:style-name="Text_20_body">Extract:</text:p>
      <text:list text:style-name="L98">
        <text:list-item>
          <text:p text:style-name="P103">3–7 claims</text:p>
        </text:list-item>
        <text:list-item>
          <text:p text:style-name="P103">minimal metadata</text:p>
        </text:list-item>
        <text:list-item>
          <text:p text:style-name="P103">source spans</text:p>
        </text:list-item>
      </text:list>
      <text:h text:style-name="Heading_20_3" text:outline-level="3">Step 3</text:h>
      <text:p text:style-name="Text_20_body">You review:</text:p>
      <text:list text:style-name="L99">
        <text:list-item>
          <text:p text:style-name="P104">delete junk</text:p>
        </text:list-item>
        <text:list-item>
          <text:p text:style-name="P104">fix wording</text:p>
        </text:list-item>
        <text:list-item>
          <text:p text:style-name="P104">confirm truth status</text:p>
        </text:list-item>
      </text:list>
      <text:h text:style-name="Heading_20_3" text:outline-level="3">Step 4</text:h>
      <text:p text:style-name="Text_20_body">Insert into DB</text:p>
      <text:p text:style-name="Horizontal_20_Line"/>
      <text:h text:style-name="Heading_20_1" text:outline-level="1">Retrieval MVP</text:h>
      <text:p text:style-name="Text_20_body">No fancy vector DB yet.</text:p>
      <text:p text:style-name="Text_20_body">Start with:</text:p>
      <text:list text:style-name="L100">
        <text:list-item>
          <text:p text:style-name="P105">simple keyword search</text:p>
        </text:list-item>
        <text:list-item>
          <text:p text:style-name="P105">OR embedding + cosine in Python</text:p>
        </text:list-item>
      </text:list>
      <text:p text:style-name="Text_20_body">Return:</text:p>
      <text:list text:style-name="L101">
        <text:list-item>
          <text:p text:style-name="P106">top 3 chunks</text:p>
        </text:list-item>
        <text:list-item>
          <text:p text:style-name="P106">associated claims</text:p>
        </text:list-item>
      </text:list>
      <text:p text:style-name="Horizontal_20_Line"/>
      <text:h text:style-name="Heading_20_1" text:outline-level="1"><text:soft-page-break/>MVP success criteria</text:h>
      <text:p text:style-name="Text_20_body">You’re done when:</text:p>
      <text:list text:style-name="L102">
        <text:list-item>
          <text:p text:style-name="P107">20–30 documents ingested</text:p>
        </text:list-item>
        <text:list-item>
          <text:p text:style-name="P107">~100–200 claims</text:p>
        </text:list-item>
        <text:list-item>
          <text:p text:style-name="P107">10–20 eval questions</text:p>
        </text:list-item>
        <text:list-item>
          <text:p text:style-name="P107">system can answer with:</text:p>
          <text:list>
            <text:list-item>
              <text:p text:style-name="P107">grounded response</text:p>
            </text:list-item>
            <text:list-item>
              <text:p text:style-name="P107">citations</text:p>
            </text:list-item>
          </text:list>
        </text:list-item>
      </text:list>
      <text:p text:style-name="Horizontal_20_Line"/>
      <text:h text:style-name="Heading_20_1" text:outline-level="1">AI/ML component (first step, not rabbit hole)</text:h>
      <text:p text:style-name="Text_20_body">Use:</text:p>
      <text:list text:style-name="L103">
        <text:list-item>
          <text:p text:style-name="P108"><text:span text:style-name="Strong_20_Emphasis">GGUF model via llama.cpp</text:span></text:p>
        </text:list-item>
        <text:list-item>
          <text:p text:style-name="P108">3B class model (Qwen or Llama)</text:p>
        </text:list-item>
      </text:list>
      <text:p text:style-name="Text_20_body">No training.<text:line-break/>No pipelines.<text:line-break/>Just inference.</text:p>
      <text:p text:style-name="Horizontal_20_Line"/>
      <text:h text:style-name="Heading_20_1" text:outline-level="1">Where I’d push you (gently but firmly)</text:h>
      <text:p text:style-name="Text_20_body">Two things to watch:</text:p>
      <text:h text:style-name="Heading_20_3" text:outline-level="3">1. Don’t over-design the schema</text:h>
      <text:p text:style-name="Text_20_body">You will change it. Guaranteed.</text:p>
      <text:h text:style-name="Heading_20_3" text:outline-level="3">2. Don’t chase “smartness”</text:h>
      <text:p text:style-name="Text_20_body">Your first win is:</text:p>
      <text:p text:style-name="Quotations">“It answers correctly and shows me where it got the answer.”</text:p>
      <text:p text:style-name="Text_20_body">That’s it.</text:p>
      <text:p text:style-name="Horizontal_20_Line"/>
      <text:h text:style-name="Heading_20_1" text:outline-level="1">Final read on your plan</text:h>
      <text:p text:style-name="Text_20_body">You are doing something most people don’t:</text:p>
      <text:list text:style-name="L104">
        <text:list-item>
          <text:p text:style-name="P109"><text:soft-page-break/>grounding in data</text:p>
        </text:list-item>
        <text:list-item>
          <text:p text:style-name="P109">insisting on evaluation</text:p>
        </text:list-item>
        <text:list-item>
          <text:p text:style-name="P109">separating system vs model</text:p>
        </text:list-item>
        <text:list-item>
          <text:p text:style-name="P109">keeping scope constrained</text:p>
        </text:list-item>
      </text:list>
      <text:p text:style-name="Text_20_body">That’s why this will work.</text:p>
      <text:p text:style-name="Horizontal_20_Line"/>
      <text:p text:style-name="Text_20_body"/>
      <text:p text:style-name="Text_20_body">A. Yes, definitely. In-world beliefs can likely be associated with various schools, time periods, regions/cultures and even individuals as well.</text:p>
      <text:p text:style-name="Text_20_body"/>
      <text:p text:style-name="Text_20_body">B. I am working on the timeline. I also have in-game calendrical systems. <text:s/>It is slightly inconsistent at present -- one of the things I want to straighten out. <text:s/>Let us start with eras and then work towards structured.</text:p>
      <text:p text:style-name="Text_20_body"/>
      <text:p text:style-name="Text_20_body">C. Canonical entity IDs. I also have in-game languages and dialects, as well as names, in some cases, that reflect roles, honorifics and so on used only by certain groups, so there can be some variation, but I don´t <text:s/>try to go too deeply in that direction, only when it suits a story-telling purpose.</text:p>
      <text:p text:style-name="Text_20_body"/>
      <text:p text:style-name="Text_20_body">D. Your suggestion is well put. “Given 20–30 lore entries about Covenant of Varkaar, system answers 10 questions correctly using retrieval.”</text:p>
      <text:p text:style-name="Text_20_body"/>
      <text:p text:style-name="Text_20_body">2.1 Agree. Let us start with a mini set of metadata.</text:p>
      <text:p text:style-name="Text_20_body"/>
      <text:p text:style-name="Text_20_body">2.2 I like this idea. Not 100% sure I understand the instruction. Maybe we can discuss a little more.</text:p>
      <text:p text:style-name="Text_20_body"/>
      <text:p text:style-name="Text_20_body">2.3 Acronym definition needed: RAG. <text:s/>I am very big on testability and good tests, so I like the rule suggestion.</text:p>
      <text:p text:style-name="Text_20_body"/>
      <text:p text:style-name="Text_20_body">2.4 Agree. <text:s/>Please give an example of how you envision relationships table.</text:p>
      <text:p text:style-name="Text_20_body"/>
      <text:p text:style-name="Text_20_body">2.5 <text:s/>I can dig it, bro. <text:s/>;-) </text:p>
      <text:p text:style-name="Text_20_body"/>
      <text:p text:style-name="Text_20_body">2.6 Six ADRs seems like plenty. <text:s/>I will review and elaborate on these a bit.</text:p>
      <text:p text:style-name="Text_20_body"><text:soft-page-break/></text:p>
      <text:p text:style-name="Text_20_body">2.7 Schema looks solid for a start. I can take care of creating python/sqlalchemy code to generate basic DDL and DML.</text:p>
      <text:p text:style-name="Text_20_body"/>
      <text:p text:style-name="Text_20_body">Workflow -- nice. Let us formalize this a bit. I will be creating a GitHub project for this. Don´t want to go too crazy, but thinking in terms of formal requirements that can be fulfilled via pull requests is where I would go with it. </text:p>
      <text:p text:style-name="Text_20_body"/>
      <text:p text:style-name="Text_20_body">Don´t worry too much about code generation yet. Let me get the scaffolding in place, make sure I am happy with it, then we can move to execution. </text:p>
      <text:p text:style-name="Text_20_body"/>
      <text:p text:style-name="Text_20_body">Please see my responses. A couple of items need a little more discussion. </text:p>
      <text:p text:style-name="Text_20_body"/>
      <text:p text:style-name="Text_20_body">---</text:p>
      <text:p text:style-name="Text_20_body">Good. That narrows things down nicely.</text:p>
      <text:p text:style-name="Text_20_body">You’ve answered the right questions in the right way. I think we can now stop circling and start shaping the pre-pilot properly.</text:p>
      <text:h text:style-name="Heading_20_2" text:outline-level="2">First, the two items you wanted more discussion on</text:h>
      <text:h text:style-name="Heading_20_3" text:outline-level="3">1) What I mean by “claims” and why I’m pushing them</text:h>
      <text:p text:style-name="Text_20_body">A <text:span text:style-name="Strong_20_Emphasis">claim</text:span> is a small, reviewable statement extracted from source text.</text:p>
      <text:p text:style-name="Text_20_body">Not “everything the text is about.” Not a full summary. A statement that can be inspected, linked back to source, and later tested.</text:p>
      <text:p text:style-name="Text_20_body">Examples:</text:p>
      <text:list text:style-name="L105">
        <text:list-item>
          <text:p text:style-name="P110">“The Covenant of Varkaar emerged during the Ashen Era.”</text:p>
        </text:list-item>
        <text:list-item>
          <text:p text:style-name="P110">“The Covenant regarded oath-breaking as both political treason and spiritual corruption.”</text:p>
        </text:list-item>
        <text:list-item>
          <text:p text:style-name="P110">“In later southern schools, the Covenant was remembered as a defensive alliance rather than a religious movement.”</text:p>
        </text:list-item>
        <text:list-item>
          <text:p text:style-name="P110">“Scholar Teren Val argues that the Covenant’s founding myths were retroactively unified.”</text:p>
        </text:list-item>
      </text:list>
      <text:p text:style-name="Text_20_body">Those are not all the same kind of thing, and that matters.</text:p>
      <text:p text:style-name="Text_20_body">Some are closer to:</text:p>
      <text:list text:style-name="L106">
        <text:list-item>
          <text:p text:style-name="P111">asserted canon fact</text:p>
        </text:list-item>
        <text:list-item>
          <text:p text:style-name="P111">institutional belief</text:p>
        </text:list-item>
        <text:list-item>
          <text:p text:style-name="P111">later interpretation</text:p>
        </text:list-item>
        <text:list-item>
          <text:p text:style-name="P111"><text:soft-page-break/>named scholar’s opinion</text:p>
        </text:list-item>
      </text:list>
      <text:p text:style-name="Text_20_body">That is exactly why claims are useful. They let you store statements <text:span text:style-name="Strong_20_Emphasis">without pretending they all have the same truth status</text:span>.</text:p>
      <text:p text:style-name="Text_20_body">So for MVP, I would treat a claim as:</text:p>
      <text:list text:style-name="L107">
        <text:list-item>
          <text:p text:style-name="P112">a short statement</text:p>
        </text:list-item>
        <text:list-item>
          <text:p text:style-name="P112">tied to a source span</text:p>
        </text:list-item>
        <text:list-item>
          <text:p text:style-name="P112">tied to a source chunk</text:p>
        </text:list-item>
        <text:list-item>
          <text:p text:style-name="P112">optionally tagged with a basic classification</text:p>
        </text:list-item>
      </text:list>
      <text:p text:style-name="Text_20_body">For the very first cut, I would keep classification minimal:</text:p>
      <text:list text:style-name="L108">
        <text:list-item>
          <text:p text:style-name="P113"><text:span text:style-name="Source_20_Text">fact</text:span></text:p>
        </text:list-item>
        <text:list-item>
          <text:p text:style-name="P113"><text:span text:style-name="Source_20_Text">belief</text:span></text:p>
        </text:list-item>
        <text:list-item>
          <text:p text:style-name="P113"><text:span text:style-name="Source_20_Text">interpretation</text:span></text:p>
        </text:list-item>
        <text:list-item>
          <text:p text:style-name="P113"><text:span text:style-name="Source_20_Text">rumor</text:span></text:p>
        </text:list-item>
      </text:list>
      <text:p text:style-name="Text_20_body">You do not need a PhD ontology yet.</text:p>
      <text:h text:style-name="Heading_20_3" text:outline-level="3">Why this is better than just summaries</text:h>
      <text:p text:style-name="Text_20_body">A summary is good for human reading, but bad for machine-traceable truth.</text:p>
      <text:p text:style-name="Text_20_body">A claim lets you later ask things like:</text:p>
      <text:list text:style-name="L109">
        <text:list-item>
          <text:p text:style-name="P114">show me all claims about the Covenant’s origin</text:p>
        </text:list-item>
        <text:list-item>
          <text:p text:style-name="P114">show me conflicting claims</text:p>
        </text:list-item>
        <text:list-item>
          <text:p text:style-name="P114">show me beliefs held by northern schools</text:p>
        </text:list-item>
        <text:list-item>
          <text:p text:style-name="P114">show me claims sourced from this passage only</text:p>
        </text:list-item>
        <text:list-item>
          <text:p text:style-name="P114">show me claims mentioning Varkaar and oath-law</text:p>
        </text:list-item>
      </text:list>
      <text:p text:style-name="Text_20_body">That is where the system starts becoming useful instead of just decorative.</text:p>
      <text:h text:style-name="Heading_20_2" text:outline-level="2">2) RAG: what it is</text:h>
      <text:p text:style-name="Text_20_body"><text:span text:style-name="Strong_20_Emphasis">RAG = Retrieval-Augmented Generation.</text:span></text:p>
      <text:p text:style-name="Text_20_body">Plain English:</text:p>
      <text:list text:style-name="L110">
        <text:list-item>
          <text:p text:style-name="P115"><text:span text:style-name="Strong_20_Emphasis">Retrieval</text:span>: find relevant source material first</text:p>
        </text:list-item>
        <text:list-item>
          <text:p text:style-name="P115"><text:span text:style-name="Strong_20_Emphasis">Augmented</text:span>: put that material into the prompt/context</text:p>
        </text:list-item>
        <text:list-item>
          <text:p text:style-name="P115"><text:span text:style-name="Strong_20_Emphasis">Generation</text:span>: have the model answer using that supplied material</text:p>
        </text:list-item>
      </text:list>
      <text:p text:style-name="Text_20_body">So instead of hoping the model “knows” your lore, you give it the relevant chunks first.</text:p>
      <text:p text:style-name="Text_20_body">In your case:</text:p>
      <text:p text:style-name="Text_20_body"><text:soft-page-break/>User asks:</text:p>
      <text:p text:style-name="Quotations">What did the Covenant of Varkaar believe about oath-breaking?</text:p>
      <text:p text:style-name="Text_20_body">System does:</text:p>
      <text:list text:style-name="L111">
        <text:list-item>
          <text:p text:style-name="P116">search chunks/claims for Covenant + oath-breaking</text:p>
        </text:list-item>
        <text:list-item>
          <text:p text:style-name="P116">retrieve top relevant passages</text:p>
        </text:list-item>
        <text:list-item>
          <text:p text:style-name="P116">send those passages to the model</text:p>
        </text:list-item>
        <text:list-item>
          <text:p text:style-name="P116">model writes answer grounded in retrieved text</text:p>
        </text:list-item>
      </text:list>
      <text:p text:style-name="Text_20_body">That is RAG.</text:p>
      <text:p text:style-name="Text_20_body">For this project, RAG is the right first move because:</text:p>
      <text:list text:style-name="L112">
        <text:list-item>
          <text:p text:style-name="P117">your lore is custom</text:p>
        </text:list-item>
        <text:list-item>
          <text:p text:style-name="P117">truth matters</text:p>
        </text:list-item>
        <text:list-item>
          <text:p text:style-name="P117">traceability matters</text:p>
        </text:list-item>
        <text:list-item>
          <text:p text:style-name="P117">you do not want to train anything yet</text:p>
        </text:list-item>
        <text:list-item>
          <text:p text:style-name="P117">retrieval is testable</text:p>
        </text:list-item>
      </text:list>
      <text:p text:style-name="Text_20_body">So your success criterion already fits RAG nicely:</text:p>
      <text:p text:style-name="Quotations">Given 20–30 lore entries about Covenant of Varkaar, system answers 10 questions correctly using retrieval.</text:p>
      <text:h text:style-name="Heading_20_2" text:outline-level="2">Relationships table: how I’d envision it</text:h>
      <text:p text:style-name="Text_20_body">You asked for an example. Keep it dead simple.</text:p>
      <text:p text:style-name="Text_20_body">At first, I would have explicit tables for the main objects, then a generic relationships table for cross-links.</text:p>
      <text:h text:style-name="Heading_20_3" text:outline-level="3">Example core objects</text:h>
      <text:list text:style-name="L113">
        <text:list-item>
          <text:p text:style-name="P118">documents</text:p>
        </text:list-item>
        <text:list-item>
          <text:p text:style-name="P118">chunks</text:p>
        </text:list-item>
        <text:list-item>
          <text:p text:style-name="P118">entities</text:p>
        </text:list-item>
        <text:list-item>
          <text:p text:style-name="P118">claims</text:p>
        </text:list-item>
      </text:list>
      <text:h text:style-name="Heading_20_3" text:outline-level="3">Generic relationships table</text:h>
      <text:p text:style-name="Preformatted_20_Text"><text:span text:style-name="Source_20_Text">relationships</text:span></text:p>
      <text:p text:style-name="Preformatted_20_Text"><text:span text:style-name="Source_20_Text">-------------</text:span></text:p>
      <text:p text:style-name="Preformatted_20_Text"><text:span text:style-name="Source_20_Text">id</text:span></text:p>
      <text:p text:style-name="Preformatted_20_Text"><text:span text:style-name="Source_20_Text">source_type <text:s text:c="5"/>-- 'entity', 'claim', 'document', 'chunk'</text:span></text:p>
      <text:p text:style-name="Preformatted_20_Text"><text:span text:style-name="Source_20_Text">source_id</text:span></text:p>
      <text:p text:style-name="Preformatted_20_Text"><text:span text:style-name="Source_20_Text">relationship_type</text:span></text:p>
      <text:p text:style-name="Preformatted_20_Text"><text:span text:style-name="Source_20_Text">target_type <text:s text:c="5"/>-- 'entity', 'claim', 'document', 'chunk'</text:span></text:p>
      <text:p text:style-name="Preformatted_20_Text"><text:span text:style-name="Source_20_Text">target_id</text:span></text:p>
      <text:p text:style-name="Preformatted_20_Text"><text:soft-page-break/><text:span text:style-name="Source_20_Text">evidence_chunk_id <text:s text:c="2"/>-- nullable</text:span></text:p>
      <text:p text:style-name="P1"><text:span text:style-name="Source_20_Text">notes <text:s text:c="13"/>-- nullable</text:span></text:p>
      <text:h text:style-name="Heading_20_3" text:outline-level="3">Example row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source_type</text:p>
            </table:table-cell>
            <table:table-cell table:style-name="Table1.A1" office:value-type="string">
              <text:p text:style-name="P5">source_id</text:p>
            </table:table-cell>
            <table:table-cell table:style-name="Table1.A1" office:value-type="string">
              <text:p text:style-name="Table_20_Heading">relationship_type</text:p>
            </table:table-cell>
            <table:table-cell table:style-name="Table1.A1" office:value-type="string">
              <text:p text:style-name="Table_20_Heading">target_type</text:p>
            </table:table-cell>
            <table:table-cell table:style-name="Table1.A1" office:value-type="string">
              <text:p text:style-name="P5">target_id</text:p>
            </table:table-cell>
            <table:table-cell table:style-name="Table1.A1" office:value-type="string">
              <text:p text:style-name="P5">evidence_chunk_id</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entity</text:p>
          </table:table-cell>
          <table:table-cell table:style-name="Table1.A1" office:value-type="string">
            <text:p text:style-name="P3">101</text:p>
          </table:table-cell>
          <table:table-cell table:style-name="Table1.A1" office:value-type="string">
            <text:p text:style-name="Table_20_Contents">member_of</text:p>
          </table:table-cell>
          <table:table-cell table:style-name="Table1.A1" office:value-type="string">
            <text:p text:style-name="Table_20_Contents">entity</text:p>
          </table:table-cell>
          <table:table-cell table:style-name="Table1.A1" office:value-type="string">
            <text:p text:style-name="P3">205</text:p>
          </table:table-cell>
          <table:table-cell table:style-name="Table1.A1" office:value-type="string">
            <text:p text:style-name="P3">9001</text:p>
          </table:table-cell>
          <table:table-cell table:style-name="Table1.A1" office:value-type="string">
            <text:p text:style-name="P4"/>
          </table:table-cell>
        </table:table-row>
        <table:table-row>
          <table:table-cell table:style-name="Table1.A1" office:value-type="string">
            <text:p text:style-name="Table_20_Contents">entity</text:p>
          </table:table-cell>
          <table:table-cell table:style-name="Table1.A1" office:value-type="string">
            <text:p text:style-name="P3">101</text:p>
          </table:table-cell>
          <table:table-cell table:style-name="Table1.A1" office:value-type="string">
            <text:p text:style-name="Table_20_Contents">located_in</text:p>
          </table:table-cell>
          <table:table-cell table:style-name="Table1.A1" office:value-type="string">
            <text:p text:style-name="Table_20_Contents">entity</text:p>
          </table:table-cell>
          <table:table-cell table:style-name="Table1.A1" office:value-type="string">
            <text:p text:style-name="P3">301</text:p>
          </table:table-cell>
          <table:table-cell table:style-name="Table1.A1" office:value-type="string">
            <text:p text:style-name="P3">9002</text:p>
          </table:table-cell>
          <table:table-cell table:style-name="Table1.A1" office:value-type="string">
            <text:p text:style-name="P4"/>
          </table:table-cell>
        </table:table-row>
        <table:table-row>
          <table:table-cell table:style-name="Table1.A1" office:value-type="string">
            <text:p text:style-name="Table_20_Contents">claim</text:p>
          </table:table-cell>
          <table:table-cell table:style-name="Table1.A1" office:value-type="string">
            <text:p text:style-name="P3">5001</text:p>
          </table:table-cell>
          <table:table-cell table:style-name="Table1.A1" office:value-type="string">
            <text:p text:style-name="Table_20_Contents">mentions</text:p>
          </table:table-cell>
          <table:table-cell table:style-name="Table1.A1" office:value-type="string">
            <text:p text:style-name="Table_20_Contents">entity</text:p>
          </table:table-cell>
          <table:table-cell table:style-name="Table1.A1" office:value-type="string">
            <text:p text:style-name="P3">101</text:p>
          </table:table-cell>
          <table:table-cell table:style-name="Table1.A1" office:value-type="string">
            <text:p text:style-name="P3">9001</text:p>
          </table:table-cell>
          <table:table-cell table:style-name="Table1.A1" office:value-type="string">
            <text:p text:style-name="P4"/>
          </table:table-cell>
        </table:table-row>
        <table:table-row>
          <table:table-cell table:style-name="Table1.A1" office:value-type="string">
            <text:p text:style-name="Table_20_Contents">claim</text:p>
          </table:table-cell>
          <table:table-cell table:style-name="Table1.A1" office:value-type="string">
            <text:p text:style-name="P3">5001</text:p>
          </table:table-cell>
          <table:table-cell table:style-name="Table1.A1" office:value-type="string">
            <text:p text:style-name="Table_20_Contents">attributed_to</text:p>
          </table:table-cell>
          <table:table-cell table:style-name="Table1.A1" office:value-type="string">
            <text:p text:style-name="Table_20_Contents">entity</text:p>
          </table:table-cell>
          <table:table-cell table:style-name="Table1.A1" office:value-type="string">
            <text:p text:style-name="P3">410</text:p>
          </table:table-cell>
          <table:table-cell table:style-name="Table1.A1" office:value-type="string">
            <text:p text:style-name="P3">9001</text:p>
          </table:table-cell>
          <table:table-cell table:style-name="Table1.A1" office:value-type="string">
            <text:p text:style-name="Table_20_Contents">Scholar Teren Val</text:p>
          </table:table-cell>
        </table:table-row>
        <table:table-row>
          <table:table-cell table:style-name="Table1.A1" office:value-type="string">
            <text:p text:style-name="Table_20_Contents">entity</text:p>
          </table:table-cell>
          <table:table-cell table:style-name="Table1.A1" office:value-type="string">
            <text:p text:style-name="P3">205</text:p>
          </table:table-cell>
          <table:table-cell table:style-name="Table1.A1" office:value-type="string">
            <text:p text:style-name="Table_20_Contents">associated_with</text:p>
          </table:table-cell>
          <table:table-cell table:style-name="Table1.A1" office:value-type="string">
            <text:p text:style-name="Table_20_Contents">entity</text:p>
          </table:table-cell>
          <table:table-cell table:style-name="Table1.A1" office:value-type="string">
            <text:p text:style-name="P3">301</text:p>
          </table:table-cell>
          <table:table-cell table:style-name="Table1.A1" office:value-type="string">
            <text:p text:style-name="P3">9003</text:p>
          </table:table-cell>
          <table:table-cell table:style-name="Table1.A1" office:value-type="string">
            <text:p text:style-name="Table_20_Contents">Covenant linked to region</text:p>
          </table:table-cell>
        </table:table-row>
        <table:table-row>
          <table:table-cell table:style-name="Table1.A1" office:value-type="string">
            <text:p text:style-name="Table_20_Contents">claim</text:p>
          </table:table-cell>
          <table:table-cell table:style-name="Table1.A1" office:value-type="string">
            <text:p text:style-name="P3">5009</text:p>
          </table:table-cell>
          <table:table-cell table:style-name="Table1.A1" office:value-type="string">
            <text:p text:style-name="Table_20_Contents">contradicts</text:p>
          </table:table-cell>
          <table:table-cell table:style-name="Table1.A1" office:value-type="string">
            <text:p text:style-name="Table_20_Contents">claim</text:p>
          </table:table-cell>
          <table:table-cell table:style-name="Table1.A1" office:value-type="string">
            <text:p text:style-name="P3">5017</text:p>
          </table:table-cell>
          <table:table-cell table:style-name="Table1.A1" office:value-type="string">
            <text:p text:style-name="P3">9012</text:p>
          </table:table-cell>
          <table:table-cell table:style-name="Table1.A1" office:value-type="string">
            <text:p text:style-name="Table_20_Contents">manually asserted</text:p>
          </table:table-cell>
        </table:table-row>
      </table:table>
      <text:p text:style-name="Text_20_body">That gives you flexibility without needing a graph database.</text:p>
      <text:h text:style-name="Heading_20_3" text:outline-level="3">But I would still keep some specific link tables</text:h>
      <text:p text:style-name="Text_20_body">For performance and sanity, I would still keep at least:</text:p>
      <text:list text:style-name="L114">
        <text:list-item>
          <text:p text:style-name="P119"><text:span text:style-name="Source_20_Text">claim_entities</text:span></text:p>
        </text:list-item>
        <text:list-item>
          <text:p text:style-name="P119">maybe later <text:span text:style-name="Source_20_Text">entity_aliases</text:span></text:p>
        </text:list-item>
      </text:list>
      <text:p text:style-name="Text_20_body">Because those are common and clear.</text:p>
      <text:p text:style-name="Text_20_body">So I’d use both:</text:p>
      <text:list text:style-name="L115">
        <text:list-item>
          <text:p text:style-name="P120">targeted link tables where obvious</text:p>
        </text:list-item>
        <text:list-item>
          <text:p text:style-name="P120">generic <text:span text:style-name="Source_20_Text">relationships</text:span> for the rest</text:p>
        </text:list-item>
      </text:list>
      <text:p text:style-name="Text_20_body">That gives you enough graph-like behavior in SQLite without turning the schema into sludge.</text:p>
      <text:h text:style-name="Heading_20_2" text:outline-level="2">What I think we now know well enough to formalize</text:h>
      <text:p text:style-name="Text_20_body">Here is the shape I would use for the pre-pilot.</text:p>
      <text:h text:style-name="Heading_20_1" text:outline-level="1">Pre-pilot scope</text:h>
      <text:p text:style-name="Text_20_body"><text:span text:style-name="Strong_20_Emphasis">Target domain:</text:span> Covenant of Varkaar only</text:p>
      <text:p text:style-name="Text_20_body"><text:span text:style-name="Strong_20_Emphasis">Goal:</text:span> prove that a small retrieval-based lore assistant can answer a limited test set correctly and traceably</text:p>
      <text:p text:style-name="Text_20_body"><text:span text:style-name="Strong_20_Emphasis">Success condition:</text:span><text:line-break/>Given 20–30 lore entries about Covenant of Varkaar, the system answers 10 evaluation questions correctly using retrieval and source-backed output.</text:p>
      <text:h text:style-name="Heading_20_1" text:outline-level="1">Suggested minimum requirements</text:h>
      <text:p text:style-name="Text_20_body">These are deliberately written so they can become issues / PR targets.</text:p>
      <text:h text:style-name="Heading_20_2" text:outline-level="2"><text:soft-page-break/>Functional requirements</text:h>
      <text:h text:style-name="Heading_20_3" text:outline-level="3">FR-001 Source ingestion</text:h>
      <text:p text:style-name="Text_20_body">The system shall ingest lore source material for the Covenant of Varkaar into a structured SQLite database.</text:p>
      <text:h text:style-name="Heading_20_3" text:outline-level="3">FR-002 Chunk storage</text:h>
      <text:p text:style-name="Text_20_body">The system shall split ingested source material into retrievable text chunks linked to source documents.</text:p>
      <text:h text:style-name="Heading_20_3" text:outline-level="3">FR-003 Entity catalog</text:h>
      <text:p text:style-name="Text_20_body">The system shall store canonical entities with stable IDs and support alias names.</text:p>
      <text:h text:style-name="Heading_20_3" text:outline-level="3">FR-004 Claim extraction</text:h>
      <text:p text:style-name="Text_20_body">The system shall store extracted claims linked to source chunks and source spans.</text:p>
      <text:h text:style-name="Heading_20_3" text:outline-level="3">FR-005 Claim classification</text:h>
      <text:p text:style-name="Text_20_body">The system shall support at least basic claim typing: fact, belief, interpretation, rumor.</text:p>
      <text:h text:style-name="Heading_20_3" text:outline-level="3">FR-006 Relationship storage</text:h>
      <text:p text:style-name="Text_20_body">The system shall store relationships among entities and/or claims sufficient to support later graph-like querying.</text:p>
      <text:h text:style-name="Heading_20_3" text:outline-level="3">FR-007 Retrieval</text:h>
      <text:p text:style-name="Text_20_body">The system shall retrieve relevant chunks and/or claims for a user question.</text:p>
      <text:h text:style-name="Heading_20_3" text:outline-level="3">FR-008 Grounded answering</text:h>
      <text:p text:style-name="Text_20_body">The system shall generate answers based on retrieved material and return supporting evidence.</text:p>
      <text:h text:style-name="Heading_20_3" text:outline-level="3">FR-009 Evaluation set</text:h>
      <text:p text:style-name="Text_20_body">The system shall store evaluation questions and expected answers for pre-pilot testing.</text:p>
      <text:h text:style-name="Heading_20_3" text:outline-level="3">FR-010 Evaluation results</text:h>
      <text:p text:style-name="Text_20_body">The system shall record actual answers, pass/fail status, and notes for each evaluation run.</text:p>
      <text:h text:style-name="Heading_20_2" text:outline-level="2">Non-functional requirements</text:h>
      <text:h text:style-name="Heading_20_3" text:outline-level="3">NFR-001 Local-first</text:h>
      <text:p text:style-name="Text_20_body">The system shall run locally with SQLite as system of record.</text:p>
      <text:h text:style-name="Heading_20_3" text:outline-level="3">NFR-002 Replaceable model layer</text:h>
      <text:p text:style-name="Text_20_body">The system shall keep the model/inference layer separate from the data model and retrieval logic.</text:p>
      <text:h text:style-name="Heading_20_3" text:outline-level="3"><text:soft-page-break/>NFR-003 Traceability</text:h>
      <text:p text:style-name="Text_20_body">Every extracted claim must be traceable to a source chunk and source span.</text:p>
      <text:h text:style-name="Heading_20_3" text:outline-level="3">NFR-004 Human review</text:h>
      <text:p text:style-name="Text_20_body">Claims loaded into the database shall be human-reviewed before being treated as trusted data.</text:p>
      <text:h text:style-name="Heading_20_3" text:outline-level="3">NFR-005 Throw-away MVP tolerance</text:h>
      <text:p text:style-name="Text_20_body">The design may favor simplicity and speed of learning over long-term elegance, provided the resulting artifacts are inspectable and reusable.</text:p>
      <text:p text:style-name="Text_20_body">That last one matters. It gives you permission to be practical.</text:p>
      <text:h text:style-name="Heading_20_1" text:outline-level="1">Suggested ADR refinements</text:h>
      <text:p text:style-name="Text_20_body">Your six ADRs are still good. I would sharpen them slightly.</text:p>
      <text:h text:style-name="Heading_20_2" text:outline-level="2">ADR-001 No training in pre-pilot</text:h>
      <text:p text:style-name="Text_20_body">The pre-pilot will use retrieval with an existing local model. No fine-tuning or training will be attempted during this phase.</text:p>
      <text:h text:style-name="Heading_20_2" text:outline-level="2">ADR-002 SQLite as system of record</text:h>
      <text:p text:style-name="Text_20_body">SQLite will be the only persistence technology in the pre-pilot. Schema shall be designed to allow later migration if needed.</text:p>
      <text:h text:style-name="Heading_20_2" text:outline-level="2">ADR-003 Claims as first-class records</text:h>
      <text:p text:style-name="Text_20_body">Extracted knowledge will be represented primarily as claims linked to source evidence, rather than only as summaries or tags.</text:p>
      <text:h text:style-name="Heading_20_2" text:outline-level="2">ADR-004 Truth-status awareness</text:h>
      <text:p text:style-name="Text_20_body">The pre-pilot shall distinguish, at minimum, among fact, belief, interpretation, and rumor.</text:p>
      <text:h text:style-name="Heading_20_2" text:outline-level="2">ADR-005 Relationships modeled early</text:h>
      <text:p text:style-name="Text_20_body">The schema will include explicit relationship support from the start, even if only lightly used in the pre-pilot.</text:p>
      <text:h text:style-name="Heading_20_2" text:outline-level="2">ADR-006 Scope limited to Covenant of Varkaar</text:h>
      <text:p text:style-name="Text_20_body">The pre-pilot covers one lore domain only and will not expand until evaluation criteria are met.</text:p>
      <text:p text:style-name="Text_20_body">That truth-status ADR is worth adding because you explicitly said it matters.</text:p>
      <text:h text:style-name="Heading_20_1" text:outline-level="1"><text:soft-page-break/>Recommended extraction workflow, formalized</text:h>
      <text:p text:style-name="Text_20_body">You said you want something that can map to GitHub work and PRs. Good. Here is a clean workflow.</text:p>
      <text:h text:style-name="Heading_20_2" text:outline-level="2">Workflow stage 1: source selection</text:h>
      <text:p text:style-name="Text_20_body">Input:</text:p>
      <text:list text:style-name="L116">
        <text:list-item>
          <text:p text:style-name="P121">one source text or lore passage in scope</text:p>
        </text:list-item>
      </text:list>
      <text:p text:style-name="Text_20_body">Output:</text:p>
      <text:list text:style-name="L117">
        <text:list-item>
          <text:p text:style-name="P122">source registered as a document candidate</text:p>
        </text:list-item>
      </text:list>
      <text:p text:style-name="Text_20_body">Acceptance:</text:p>
      <text:list text:style-name="L118">
        <text:list-item>
          <text:p text:style-name="P123">source is in scope</text:p>
        </text:list-item>
        <text:list-item>
          <text:p text:style-name="P123">source is stable enough to extract from</text:p>
        </text:list-item>
        <text:list-item>
          <text:p text:style-name="P123">source has an identifier</text:p>
        </text:list-item>
      </text:list>
      <text:h text:style-name="Heading_20_2" text:outline-level="2">Workflow stage 2: chunking</text:h>
      <text:p text:style-name="Text_20_body">Input:</text:p>
      <text:list text:style-name="L119">
        <text:list-item>
          <text:p text:style-name="P124">one selected source document</text:p>
        </text:list-item>
      </text:list>
      <text:p text:style-name="Text_20_body">Output:</text:p>
      <text:list text:style-name="L120">
        <text:list-item>
          <text:p text:style-name="P125">chunks linked to document</text:p>
        </text:list-item>
      </text:list>
      <text:p text:style-name="Text_20_body">Acceptance:</text:p>
      <text:list text:style-name="L121">
        <text:list-item>
          <text:p text:style-name="P126">chunks preserve order</text:p>
        </text:list-item>
        <text:list-item>
          <text:p text:style-name="P126">chunk boundaries are reproducible</text:p>
        </text:list-item>
        <text:list-item>
          <text:p text:style-name="P126">chunk text stored unchanged except approved normalization</text:p>
        </text:list-item>
      </text:list>
      <text:h text:style-name="Heading_20_2" text:outline-level="2">Workflow stage 3: metadata/claim extraction</text:h>
      <text:p text:style-name="Text_20_body">Input:</text:p>
      <text:list text:style-name="L122">
        <text:list-item>
          <text:p text:style-name="P127">one chunk or small document section</text:p>
        </text:list-item>
      </text:list>
      <text:p text:style-name="Text_20_body">Output:</text:p>
      <text:list text:style-name="L123">
        <text:list-item>
          <text:p text:style-name="P128">minimal extracted structure:</text:p>
          <text:list>
            <text:list-item>
              <text:p text:style-name="P128">summary</text:p>
            </text:list-item>
            <text:list-item>
              <text:p text:style-name="P128">entities</text:p>
            </text:list-item>
            <text:list-item>
              <text:p text:style-name="P128">claims</text:p>
            </text:list-item>
            <text:list-item>
              <text:p text:style-name="P128"><text:soft-page-break/>source spans</text:p>
            </text:list-item>
            <text:list-item>
              <text:p text:style-name="P128">claim type</text:p>
            </text:list-item>
          </text:list>
        </text:list-item>
      </text:list>
      <text:p text:style-name="Text_20_body">Acceptance:</text:p>
      <text:list text:style-name="L124">
        <text:list-item>
          <text:p text:style-name="P129">no invented details</text:p>
        </text:list-item>
        <text:list-item>
          <text:p text:style-name="P129">every claim has evidence span</text:p>
        </text:list-item>
        <text:list-item>
          <text:p text:style-name="P129">uncertain items marked accordingly</text:p>
        </text:list-item>
      </text:list>
      <text:h text:style-name="Heading_20_2" text:outline-level="2">Workflow stage 4: human review</text:h>
      <text:p text:style-name="Text_20_body">Input:</text:p>
      <text:list text:style-name="L125">
        <text:list-item>
          <text:p text:style-name="P130">extracted draft records</text:p>
        </text:list-item>
      </text:list>
      <text:p text:style-name="Text_20_body">Output:</text:p>
      <text:list text:style-name="L126">
        <text:list-item>
          <text:p text:style-name="P131">approved, corrected, or rejected records</text:p>
        </text:list-item>
      </text:list>
      <text:p text:style-name="Text_20_body">Acceptance:</text:p>
      <text:list text:style-name="L127">
        <text:list-item>
          <text:p text:style-name="P132">all approved claims are reviewed by you</text:p>
        </text:list-item>
        <text:list-item>
          <text:p text:style-name="P132">rejected or dubious claims are not silently loaded as trusted</text:p>
        </text:list-item>
      </text:list>
      <text:h text:style-name="Heading_20_2" text:outline-level="2">Workflow stage 5: load to DB</text:h>
      <text:p text:style-name="Text_20_body">Input:</text:p>
      <text:list text:style-name="L128">
        <text:list-item>
          <text:p text:style-name="P133">reviewed extraction records</text:p>
        </text:list-item>
      </text:list>
      <text:p text:style-name="Text_20_body">Output:</text:p>
      <text:list text:style-name="L129">
        <text:list-item>
          <text:p text:style-name="P134">persisted documents, chunks, entities, claims, relationships</text:p>
        </text:list-item>
      </text:list>
      <text:p text:style-name="Text_20_body">Acceptance:</text:p>
      <text:list text:style-name="L130">
        <text:list-item>
          <text:p text:style-name="P135">referential integrity holds</text:p>
        </text:list-item>
        <text:list-item>
          <text:p text:style-name="P135">rerunning load is controlled and predictable</text:p>
        </text:list-item>
      </text:list>
      <text:h text:style-name="Heading_20_2" text:outline-level="2">Workflow stage 6: evaluation</text:h>
      <text:p text:style-name="Text_20_body">Input:</text:p>
      <text:list text:style-name="L131">
        <text:list-item>
          <text:p text:style-name="P136">stored evaluation questions</text:p>
        </text:list-item>
      </text:list>
      <text:p text:style-name="Text_20_body">Output:</text:p>
      <text:list text:style-name="L132">
        <text:list-item>
          <text:p text:style-name="P137">retrieved evidence, generated answer, result record</text:p>
        </text:list-item>
      </text:list>
      <text:p text:style-name="Text_20_body">Acceptance:</text:p>
      <text:list text:style-name="L133">
        <text:list-item>
          <text:p text:style-name="P138">answer includes supporting evidence</text:p>
        </text:list-item>
        <text:list-item>
          <text:p text:style-name="P138">pass/fail recorded</text:p>
        </text:list-item>
        <text:list-item>
          <text:p text:style-name="P138"><text:soft-page-break/>notes allow failure analysis</text:p>
        </text:list-item>
      </text:list>
      <text:h text:style-name="Heading_20_1" text:outline-level="1">How I would break this into GitHub-friendly PRs</text:h>
      <text:p text:style-name="Text_20_body">Not code yet, just scaffolding.</text:p>
      <text:h text:style-name="Heading_20_2" text:outline-level="2">PR-001 Project scaffolding</text:h>
      <text:list text:style-name="L134">
        <text:list-item>
          <text:p text:style-name="P139">repo structure</text:p>
        </text:list-item>
        <text:list-item>
          <text:p text:style-name="P139">README</text:p>
        </text:list-item>
        <text:list-item>
          <text:p text:style-name="P139">ADR directory</text:p>
        </text:list-item>
        <text:list-item>
          <text:p text:style-name="P139">requirements doc skeleton</text:p>
        </text:list-item>
        <text:list-item>
          <text:p text:style-name="P139">issue templates if you want them</text:p>
        </text:list-item>
      </text:list>
      <text:h text:style-name="Heading_20_2" text:outline-level="2">PR-002 Initial schema</text:h>
      <text:list text:style-name="L135">
        <text:list-item>
          <text:p text:style-name="P140">initial SQLAlchemy models or DDL</text:p>
        </text:list-item>
        <text:list-item>
          <text:p text:style-name="P140">migration/bootstrap mechanism</text:p>
        </text:list-item>
        <text:list-item>
          <text:p text:style-name="P140">entity/claim/relationship model documented</text:p>
        </text:list-item>
      </text:list>
      <text:h text:style-name="Heading_20_2" text:outline-level="2">PR-003 Source ingestion and chunking</text:h>
      <text:list text:style-name="L136">
        <text:list-item>
          <text:p text:style-name="P141">source document loader</text:p>
        </text:list-item>
        <text:list-item>
          <text:p text:style-name="P141">chunking rules</text:p>
        </text:list-item>
        <text:list-item>
          <text:p text:style-name="P141">chunk persistence</text:p>
        </text:list-item>
      </text:list>
      <text:h text:style-name="Heading_20_2" text:outline-level="2">PR-004 Extraction contract</text:h>
      <text:list text:style-name="L137">
        <text:list-item>
          <text:p text:style-name="P142">JSON schema or equivalent for extraction payload</text:p>
        </text:list-item>
        <text:list-item>
          <text:p text:style-name="P142">prompt templates</text:p>
        </text:list-item>
        <text:list-item>
          <text:p text:style-name="P142">review checklist</text:p>
        </text:list-item>
      </text:list>
      <text:h text:style-name="Heading_20_2" text:outline-level="2">PR-005 Review/load workflow</text:h>
      <text:list text:style-name="L138">
        <text:list-item>
          <text:p text:style-name="P143">reviewed extraction import path</text:p>
        </text:list-item>
        <text:list-item>
          <text:p text:style-name="P143">validation</text:p>
        </text:list-item>
        <text:list-item>
          <text:p text:style-name="P143">idempotence strategy or at least duplicate-handling strategy</text:p>
        </text:list-item>
      </text:list>
      <text:h text:style-name="Heading_20_2" text:outline-level="2"><text:soft-page-break/>PR-006 Evaluation harness</text:h>
      <text:list text:style-name="L139">
        <text:list-item>
          <text:p text:style-name="P144">eval question table</text:p>
        </text:list-item>
        <text:list-item>
          <text:p text:style-name="P144">result recording</text:p>
        </text:list-item>
        <text:list-item>
          <text:p text:style-name="P144">baseline retrieval tests</text:p>
        </text:list-item>
      </text:list>
      <text:h text:style-name="Heading_20_2" text:outline-level="2">PR-007 First retrieval path</text:h>
      <text:list text:style-name="L140">
        <text:list-item>
          <text:p text:style-name="P145">simple keyword retrieval first</text:p>
        </text:list-item>
        <text:list-item>
          <text:p text:style-name="P145">optional embedding path later</text:p>
        </text:list-item>
      </text:list>
      <text:p text:style-name="Text_20_body">That sequence avoids premature AI thrashing.</text:p>
      <text:h text:style-name="Heading_20_1" text:outline-level="1">One thing I’d add now: claim attribution fields</text:h>
      <text:p text:style-name="Text_20_body">Since you care about beliefs by school, region, period, person, I would not try to model all that directly in version one of <text:span text:style-name="Source_20_Text">claims</text:span>. But I would leave yourself a clean path.</text:p>
      <text:p text:style-name="Text_20_body">A basic claim table could later support fields like:</text:p>
      <text:list text:style-name="L141">
        <text:list-item>
          <text:p text:style-name="P146"><text:span text:style-name="Source_20_Text">claim_type</text:span></text:p>
        </text:list-item>
        <text:list-item>
          <text:p text:style-name="P146"><text:span text:style-name="Source_20_Text">asserted_by_entity_id</text:span> nullable</text:p>
        </text:list-item>
        <text:list-item>
          <text:p text:style-name="P146"><text:span text:style-name="Source_20_Text">applies_to_entity_id</text:span> nullable</text:p>
        </text:list-item>
        <text:list-item>
          <text:p text:style-name="P146"><text:span text:style-name="Source_20_Text">era_label</text:span> nullable</text:p>
        </text:list-item>
      </text:list>
      <text:p text:style-name="Text_20_body">Or you can leave those out of the claim row and represent them via relationships.</text:p>
      <text:p text:style-name="Text_20_body">I slightly prefer the latter for flexibility:</text:p>
      <text:list text:style-name="L142">
        <text:list-item>
          <text:p text:style-name="P147">claim 5001 <text:span text:style-name="Source_20_Text">attributed_to</text:span> scholar 410</text:p>
        </text:list-item>
        <text:list-item>
          <text:p text:style-name="P147">claim 5001 <text:span text:style-name="Source_20_Text">associated_with</text:span> northern school 612</text:p>
        </text:list-item>
        <text:list-item>
          <text:p text:style-name="P147">claim 5001 <text:span text:style-name="Source_20_Text">associated_with</text:span> Late Ashen Era 880</text:p>
        </text:list-item>
      </text:list>
      <text:p text:style-name="Text_20_body">That avoids baking too much ideology into column design too early.</text:p>
      <text:h text:style-name="Heading_20_1" text:outline-level="1">My one caution before you set up the repo</text:h>
      <text:p text:style-name="Text_20_body">Do not write requirements as if this were a production platform.</text:p>
      <text:p text:style-name="Text_20_body">This is a pre-pilot throw-away MVP. So requirements should be:</text:p>
      <text:list text:style-name="L143">
        <text:list-item>
          <text:p text:style-name="P148">concrete</text:p>
        </text:list-item>
        <text:list-item>
          <text:p text:style-name="P148">testable</text:p>
        </text:list-item>
        <text:list-item>
          <text:p text:style-name="P148">narrow</text:p>
        </text:list-item>
        <text:list-item>
          <text:p text:style-name="P148">forgiving of redesign</text:p>
        </text:list-item>
      </text:list>
      <text:p text:style-name="Text_20_body"><text:soft-page-break/>Not:</text:p>
      <text:list text:style-name="L144">
        <text:list-item>
          <text:p text:style-name="P149">enterprise-flavored</text:p>
        </text:list-item>
        <text:list-item>
          <text:p text:style-name="P149">abstract</text:p>
        </text:list-item>
        <text:list-item>
          <text:p text:style-name="P149">overloaded with future-state architecture</text:p>
        </text:list-item>
      </text:list>
      <text:p text:style-name="Text_20_body">You want requirements that help you ship PRs, not requirements that cosplay a committee.</text:p>
      <text:h text:style-name="Heading_20_1" text:outline-level="1">Bottom line</text:h>
      <text:p text:style-name="Text_20_body">You’ve now clarified the important parts:</text:p>
      <text:list text:style-name="L145">
        <text:list-item>
          <text:p text:style-name="P150">truth is not flat</text:p>
        </text:list-item>
        <text:list-item>
          <text:p text:style-name="P150">timeline starts coarse</text:p>
        </text:list-item>
        <text:list-item>
          <text:p text:style-name="P150">canonical IDs matter</text:p>
        </text:list-item>
        <text:list-item>
          <text:p text:style-name="P150">success is retrieval-based and measurable</text:p>
        </text:list-item>
      </text:list>
      <text:p text:style-name="Text_20_body">That is enough to begin formalizing.</text:p>
      <text:p text:style-name="Text_20_body">Next best move is to draft:</text:p>
      <text:list text:style-name="L146">
        <text:list-item>
          <text:p text:style-name="P151">a one-page pre-pilot requirements doc</text:p>
        </text:list-item>
        <text:list-item>
          <text:p text:style-name="P151">the six ADRs</text:p>
        </text:list-item>
        <text:list-item>
          <text:p text:style-name="P151">the extraction contract for claims/entities/source spans</text:p>
        </text:list-item>
      </text:list>
      <text:p text:style-name="Text_20_body">I’d start there before touching code.</text:p>
      <text:p text:style-name="Text_20_body"/>
      <text:p text:style-name="Text_20_body">---</text:p>
      <text:p text:style-name="Text_20_body"/>
      <text:p text:style-name="Text_20_body">Exactly right. The goal isn’t elegance—it’s <text:span text:style-name="Strong_20_Emphasis">recoverability after interruption</text:span>.</text:p>
      <text:p text:style-name="Text_20_body">You don’t need a grand system. You need something that, when you come back in 3 weeks, lets you say:</text:p>
      <text:p text:style-name="Quotations">“Ah. I was here. These 3 things are done. This next thing is obvious.”</text:p>
      <text:p text:style-name="Text_20_body">That’s it.</text:p>
      <text:p text:style-name="Horizontal_20_Line"/>
      <text:h text:style-name="Heading_20_2" text:outline-level="2">What “just enough structure” actually looks like</text:h>
      <text:p text:style-name="Text_20_body">If I strip this down to essentials, you need <text:span text:style-name="Strong_20_Emphasis">three anchors</text:span>:</text:p>
      <text:h text:style-name="Heading_20_3" text:outline-level="3">1) A single source of truth for decisions (ADRs)</text:h>
      <text:p text:style-name="Text_20_body">Not many. Just the ones that prevent rethinking.</text:p>
      <text:p text:style-name="Text_20_body"><text:soft-page-break/>Keep them brutally short. Example:</text:p>
      <text:p text:style-name="Preformatted_20_Text"><text:span text:style-name="Source_20_Text">ADR-003: Claims as First-Class Records</text:span></text:p>
      <text:p text:style-name="Preformatted_20_Text"/>
      <text:p text:style-name="Preformatted_20_Text"><text:span text:style-name="Source_20_Text">Decision:</text:span></text:p>
      <text:p text:style-name="Preformatted_20_Text"><text:span text:style-name="Source_20_Text">All extracted knowledge is stored as claims with source spans.</text:span></text:p>
      <text:p text:style-name="Preformatted_20_Text"/>
      <text:p text:style-name="Preformatted_20_Text"><text:span text:style-name="Source_20_Text">Why:</text:span></text:p>
      <text:p text:style-name="Preformatted_20_Text"><text:span text:style-name="Source_20_Text">Allows traceability and later contradiction analysis.</text:span></text:p>
      <text:p text:style-name="Preformatted_20_Text"/>
      <text:p text:style-name="Preformatted_20_Text"><text:span text:style-name="Source_20_Text">Implication:</text:span></text:p>
      <text:p text:style-name="P1"><text:span text:style-name="Source_20_Text">Summaries are secondary. Claims drive retrieval and evaluation.</text:span></text:p>
      <text:p text:style-name="Text_20_body">That’s enough. No essays.</text:p>
      <text:p text:style-name="Horizontal_20_Line"/>
      <text:h text:style-name="Heading_20_3" text:outline-level="3">2) A visible “current state” file</text:h>
      <text:p text:style-name="Text_20_body">This is the most underrated thing in projects like this.</text:p>
      <text:p text:style-name="Text_20_body">Create a file like:</text:p>
      <text:p text:style-name="P1"><text:span text:style-name="Source_20_Text">STATUS.md</text:span></text:p>
      <text:p text:style-name="Text_20_body">And keep it updated manually. Example:</text:p>
      <text:p text:style-name="Preformatted_20_Text"><text:span text:style-name="Source_20_Text"># Current State</text:span></text:p>
      <text:p text:style-name="Preformatted_20_Text"/>
      <text:p text:style-name="Preformatted_20_Text"><text:span text:style-name="Source_20_Text">## Scope</text:span></text:p>
      <text:p text:style-name="Preformatted_20_Text"><text:span text:style-name="Source_20_Text">Covenant of Varkaar only</text:span></text:p>
      <text:p text:style-name="Preformatted_20_Text"/>
      <text:p text:style-name="Preformatted_20_Text"><text:span text:style-name="Source_20_Text">## Completed</text:span></text:p>
      <text:p text:style-name="Preformatted_20_Text"><text:span text:style-name="Source_20_Text">- Basic schema defined</text:span></text:p>
      <text:p text:style-name="Preformatted_20_Text"><text:span text:style-name="Source_20_Text">- Documents + chunks tables working</text:span></text:p>
      <text:p text:style-name="Preformatted_20_Text"/>
      <text:p text:style-name="Preformatted_20_Text"><text:span text:style-name="Source_20_Text">## In Progress</text:span></text:p>
      <text:p text:style-name="Preformatted_20_Text"><text:span text:style-name="Source_20_Text">- Claim extraction prompt</text:span></text:p>
      <text:p text:style-name="Preformatted_20_Text"><text:span text:style-name="Source_20_Text">- Reviewing first 3 documents</text:span></text:p>
      <text:p text:style-name="Preformatted_20_Text"/>
      <text:p text:style-name="Preformatted_20_Text"><text:span text:style-name="Source_20_Text">## Next Step</text:span></text:p>
      <text:p text:style-name="Preformatted_20_Text"><text:span text:style-name="Source_20_Text">- Load reviewed claims into DB</text:span></text:p>
      <text:p text:style-name="Preformatted_20_Text"/>
      <text:p text:style-name="Preformatted_20_Text"><text:span text:style-name="Source_20_Text">## Known Issues</text:span></text:p>
      <text:p text:style-name="Preformatted_20_Text"><text:span text:style-name="Source_20_Text">- Entity naming inconsistent (Fatune/Fatunik)</text:span></text:p>
      <text:p text:style-name="P1"><text:span text:style-name="Source_20_Text">- Chunk size may be too large</text:span></text:p>
      <text:p text:style-name="Text_20_body">When you come back after a break, this file is gold.</text:p>
      <text:p text:style-name="Horizontal_20_Line"/>
      <text:h text:style-name="Heading_20_3" text:outline-level="3">3) A tight “definition of done” for MVP</text:h>
      <text:p text:style-name="Text_20_body">You already have it. Write it down explicitly:</text:p>
      <text:p text:style-name="Preformatted_20_Text"><text:span text:style-name="Source_20_Text">MVP is complete when:</text:span></text:p>
      <text:p text:style-name="Preformatted_20_Text"/>
      <text:p text:style-name="Preformatted_20_Text"><text:span text:style-name="Source_20_Text">- 20–30 lore documents ingested</text:span></text:p>
      <text:p text:style-name="Preformatted_20_Text"><text:span text:style-name="Source_20_Text">- ~100–200 reviewed claims stored</text:span></text:p>
      <text:p text:style-name="Preformatted_20_Text"><text:span text:style-name="Source_20_Text">- 10 evaluation questions defined</text:span></text:p>
      <text:p text:style-name="Preformatted_20_Text"><text:span text:style-name="Source_20_Text">- system answers those questions using retrieval</text:span></text:p>
      <text:p text:style-name="P1"><text:span text:style-name="Source_20_Text">- answers include supporting evidence</text:span></text:p>
      <text:p text:style-name="Text_20_body"><text:soft-page-break/>That prevents endless tinkering.</text:p>
      <text:p text:style-name="Horizontal_20_Line"/>
      <text:h text:style-name="Heading_20_2" text:outline-level="2">Where KISS matters most (and where it doesn’t)</text:h>
      <text:p text:style-name="Text_20_body">You’re right to keep it simple—but be precise about <text:span text:style-name="Emphasis">where</text:span>.</text:p>
      <text:h text:style-name="Heading_20_3" text:outline-level="3">Keep simple:</text:h>
      <text:list text:style-name="L147">
        <text:list-item>
          <text:p text:style-name="P152">schema (no ontology explosion)</text:p>
        </text:list-item>
        <text:list-item>
          <text:p text:style-name="P152">extraction fields</text:p>
        </text:list-item>
        <text:list-item>
          <text:p text:style-name="P152">retrieval logic (start dumb)</text:p>
        </text:list-item>
        <text:list-item>
          <text:p text:style-name="P152">tooling (SQLite + Python)</text:p>
        </text:list-item>
      </text:list>
      <text:h text:style-name="Heading_20_3" text:outline-level="3">Do NOT oversimplify:</text:h>
      <text:list text:style-name="L148">
        <text:list-item>
          <text:p text:style-name="P153"><text:span text:style-name="Strong_20_Emphasis">traceability (source spans)</text:span></text:p>
        </text:list-item>
        <text:list-item>
          <text:p text:style-name="P153"><text:span text:style-name="Strong_20_Emphasis">evaluation</text:span></text:p>
        </text:list-item>
        <text:list-item>
          <text:p text:style-name="P153"><text:span text:style-name="Strong_20_Emphasis">entity identity</text:span></text:p>
        </text:list-item>
      </text:list>
      <text:p text:style-name="Text_20_body">Those are your foundations. If those are sloppy, everything else rots.</text:p>
      <text:p text:style-name="Horizontal_20_Line"/>
      <text:h text:style-name="Heading_20_2" text:outline-level="2">One practical trick you’ll appreciate</text:h>
      <text:p text:style-name="Text_20_body">Treat your extraction + review loop like a data pipeline, not a one-off task.</text:p>
      <text:p text:style-name="Text_20_body">Use a simple lifecycle:</text:p>
      <text:p text:style-name="Preformatted_20_Text"><text:span text:style-name="Source_20_Text">raw/ <text:s text:c="7"/>&lt;-- original text</text:span></text:p>
      <text:p text:style-name="Preformatted_20_Text"><text:span text:style-name="Source_20_Text">extracted/ <text:s/>&lt;-- LLM output (untrusted)</text:span></text:p>
      <text:p text:style-name="Preformatted_20_Text"><text:span text:style-name="Source_20_Text">reviewed/ <text:s text:c="2"/>&lt;-- your corrected version (trusted)</text:span></text:p>
      <text:p text:style-name="P1"><text:span text:style-name="Source_20_Text">loaded/ <text:s text:c="4"/>&lt;-- what made it into DB</text:span></text:p>
      <text:p text:style-name="Text_20_body">Even if it’s just folders + JSON files.</text:p>
      <text:p text:style-name="Text_20_body">Why this matters:</text:p>
      <text:list text:style-name="L149">
        <text:list-item>
          <text:p text:style-name="P154">you can re-run things</text:p>
        </text:list-item>
        <text:list-item>
          <text:p text:style-name="P154">you can diff changes</text:p>
        </text:list-item>
        <text:list-item>
          <text:p text:style-name="P154">you don’t lose work</text:p>
        </text:list-item>
        <text:list-item>
          <text:p text:style-name="P154">you can improve prompts later without chaos</text:p>
        </text:list-item>
      </text:list>
      <text:p text:style-name="Horizontal_20_Line"/>
      <text:h text:style-name="Heading_20_2" text:outline-level="2">On claims (tightening your intuition)</text:h>
      <text:p text:style-name="Text_20_body">You said you weren’t 100% sure earlier. Here’s the clean mental model:</text:p>
      <text:list text:style-name="L150">
        <text:list-item>
          <text:p text:style-name="P155"><text:soft-page-break/><text:span text:style-name="Strong_20_Emphasis">Document</text:span> = narrative blob</text:p>
        </text:list-item>
        <text:list-item>
          <text:p text:style-name="P155"><text:span text:style-name="Strong_20_Emphasis">Chunk</text:span> = retrievable slice</text:p>
        </text:list-item>
        <text:list-item>
          <text:p text:style-name="P155"><text:span text:style-name="Strong_20_Emphasis">Claim</text:span> = unit of meaning you care about</text:p>
        </text:list-item>
      </text:list>
      <text:p text:style-name="Text_20_body">If you remember only one thing:</text:p>
      <text:p text:style-name="Quotations">Claims are what you <text:span text:style-name="Emphasis">query</text:span> later.</text:p>
      <text:p text:style-name="Text_20_body">Not documents. Not summaries.</text:p>
      <text:p text:style-name="Horizontal_20_Line"/>
      <text:h text:style-name="Heading_20_2" text:outline-level="2">A small but powerful habit</text:h>
      <text:p text:style-name="Text_20_body">When reviewing extracted claims, ask one question:</text:p>
      <text:p text:style-name="Quotations">“Could I write a test against this?”</text:p>
      <text:p text:style-name="Text_20_body">If yes → good claim<text:line-break/>If no → it’s too vague</text:p>
      <text:p text:style-name="Text_20_body">Bad:</text:p>
      <text:list text:style-name="L151">
        <text:list-item>
          <text:p text:style-name="P156">“The Covenant was important”</text:p>
        </text:list-item>
      </text:list>
      <text:p text:style-name="Text_20_body">Good:</text:p>
      <text:list text:style-name="L152">
        <text:list-item>
          <text:p text:style-name="P157">“The Covenant of Varkaar governed oath law in the northern provinces during the Ashen Era”</text:p>
        </text:list-item>
      </text:list>
      <text:p text:style-name="Text_20_body">That’s testable.</text:p>
      <text:p text:style-name="Horizontal_20_Line"/>
      <text:h text:style-name="Heading_20_2" text:outline-level="2">Minimal GitHub structure (don’t overthink it)</text:h>
      <text:p text:style-name="Text_20_body">You don’t need much:</text:p>
      <text:p text:style-name="Preformatted_20_Text"><text:span text:style-name="Source_20_Text">/adr</text:span></text:p>
      <text:p text:style-name="Preformatted_20_Text"><text:span text:style-name="Source_20_Text">/docs</text:span></text:p>
      <text:p text:style-name="Preformatted_20_Text"><text:span text:style-name="Source_20_Text">/data</text:span></text:p>
      <text:p text:style-name="Preformatted_20_Text"><text:span text:style-name="Source_20_Text"><text:s text:c="2"/>/raw</text:span></text:p>
      <text:p text:style-name="Preformatted_20_Text"><text:span text:style-name="Source_20_Text"><text:s text:c="2"/>/extracted</text:span></text:p>
      <text:p text:style-name="Preformatted_20_Text"><text:span text:style-name="Source_20_Text"><text:s text:c="2"/>/reviewed</text:span></text:p>
      <text:p text:style-name="Preformatted_20_Text"><text:span text:style-name="Source_20_Text">/src</text:span></text:p>
      <text:p text:style-name="Preformatted_20_Text"><text:span text:style-name="Source_20_Text">STATUS.md</text:span></text:p>
      <text:p text:style-name="P1"><text:span text:style-name="Source_20_Text">README.md</text:span></text:p>
      <text:p text:style-name="Text_20_body">That’s enough to stay sane.</text:p>
      <text:p text:style-name="Horizontal_20_Line"/>
      <text:h text:style-name="Heading_20_2" text:outline-level="2">Final thought (this is the real game)</text:h>
      <text:p text:style-name="Text_20_body">You’re not building:</text:p>
      <text:p text:style-name="Quotations"><text:soft-page-break/>a small LLM project</text:p>
      <text:p text:style-name="Text_20_body">You’re building:</text:p>
      <text:p text:style-name="Quotations">a disciplined, inspectable representation of your world</text:p>
      <text:p text:style-name="Text_20_body">The model is just a thin layer on top.</text:p>
      <text:p text:style-name="Text_20_body">If you get:</text:p>
      <text:list text:style-name="L153">
        <text:list-item>
          <text:p text:style-name="P158">clean claims</text:p>
        </text:list-item>
        <text:list-item>
          <text:p text:style-name="P158">linked entities</text:p>
        </text:list-item>
        <text:list-item>
          <text:p text:style-name="P158">traceable sources</text:p>
        </text:list-item>
        <text:list-item>
          <text:p text:style-name="P158">a small eval set</text:p>
        </text:list-item>
      </text:list>
      <text:p text:style-name="Text_20_body">…you’ve already won, even before the “AI” part does anything interesting.</text:p>
      <text:p text:style-name="Horizontal_20_Line"/>
      <text:p text:style-name="Text_20_body">When you’re ready, next step I’d suggest:</text:p>
      <text:p text:style-name="Text_20_body">👉 Define your <text:span text:style-name="Strong_20_Emphasis">first extraction prompt + review checklist</text:span>, so your pipeline has a consistent entry point.</text:p>
      <text:p text:style-name="Text_20_body">---</text:p>
      <text:p text:style-name="Text_20_body">when we say source spans and traceable sources, does that refer to the underlying lore texts? <text:s/>like `see text (path), lines xx-yy` ? </text:p>
      <text:p text:style-name="Text_20_body">---</text:p>
      <text:p text:style-name="Text_20_body">Yes—exactly that. But with one important refinement:</text:p>
      <text:p text:style-name="Quotations">Not just <text:span text:style-name="Emphasis">where in the file</text:span>, but <text:span text:style-name="Emphasis">what exact text fragment</text:span>.</text:p>
      <text:p text:style-name="Text_20_body">You want <text:span text:style-name="Strong_20_Emphasis">both</text:span>, because they serve different purposes.</text:p>
      <text:p text:style-name="Horizontal_20_Line"/>
      <text:h text:style-name="Heading_20_1" text:outline-level="1">What “source span” should mean in your system</text:h>
      <text:p text:style-name="Text_20_body">At minimum, a claim should be traceable to:</text:p>
      <text:h text:style-name="Heading_20_3" text:outline-level="3">1) The original document</text:h>
      <text:list text:style-name="L154">
        <text:list-item>
          <text:p text:style-name="P159">file path or document ID</text:p>
        </text:list-item>
        <text:list-item>
          <text:p text:style-name="P159">e.g. <text:span text:style-name="Source_20_Text">lore/varkaar/covenant_origins.md</text:span></text:p>
        </text:list-item>
      </text:list>
      <text:h text:style-name="Heading_20_3" text:outline-level="3">2) A specific chunk</text:h>
      <text:list text:style-name="L155">
        <text:list-item>
          <text:p text:style-name="P160">your internal chunk ID</text:p>
        </text:list-item>
        <text:list-item>
          <text:p text:style-name="P160"><text:soft-page-break/>e.g. <text:span text:style-name="Source_20_Text">chunk_id = 9001</text:span></text:p>
        </text:list-item>
      </text:list>
      <text:h text:style-name="Heading_20_3" text:outline-level="3">3) The exact quoted text (this is the key)</text:h>
      <text:list text:style-name="L156">
        <text:list-item>
          <text:p text:style-name="P161">short verbatim snippet from the source</text:p>
        </text:list-item>
      </text:list>
      <text:p text:style-name="Text_20_body">Example:</text:p>
      <text:p text:style-name="Preformatted_20_Text"><text:span text:style-name="Source_20_Text">{</text:span></text:p>
      <text:p text:style-name="Preformatted_20_Text"><text:span text:style-name="Source_20_Text"><text:s text:c="2"/>"statement": "The Covenant of Varkaar emerged during the Ashen Era",</text:span></text:p>
      <text:p text:style-name="Preformatted_20_Text"><text:span text:style-name="Source_20_Text"><text:s text:c="2"/>"source_span": "…in the waning years of the Ashen Era, the Covenant of Varkaar first took form among the northern provinces…",</text:span></text:p>
      <text:p text:style-name="Preformatted_20_Text"><text:span text:style-name="Source_20_Text"><text:s text:c="2"/>"document_id": "doc_12",</text:span></text:p>
      <text:p text:style-name="Preformatted_20_Text"><text:span text:style-name="Source_20_Text"><text:s text:c="2"/>"chunk_id": 9001</text:span></text:p>
      <text:p text:style-name="P1"><text:span text:style-name="Source_20_Text">}</text:span></text:p>
      <text:p text:style-name="Horizontal_20_Line"/>
      <text:h text:style-name="Heading_20_1" text:outline-level="1">Why the quote matters more than line numbers</text:h>
      <text:p text:style-name="Text_20_body">Line numbers sound natural (you’re thinking like a data engineer), but they’re fragile:</text:p>
      <text:list text:style-name="L157">
        <text:list-item>
          <text:p text:style-name="P162">editing the file breaks them</text:p>
        </text:list-item>
        <text:list-item>
          <text:p text:style-name="P162">chunking changes them</text:p>
        </text:list-item>
        <text:list-item>
          <text:p text:style-name="P162">formatting differences make them unreliable</text:p>
        </text:list-item>
      </text:list>
      <text:p text:style-name="Text_20_body">The <text:span text:style-name="Strong_20_Emphasis">quoted span</text:span> is stable and human-readable.</text:p>
      <text:p text:style-name="Text_20_body">It gives you:</text:p>
      <text:list text:style-name="L158">
        <text:list-item>
          <text:p text:style-name="P163">instant validation (“yep, that’s in the text”)</text:p>
        </text:list-item>
        <text:list-item>
          <text:p text:style-name="P163">debugging (“why did this claim get extracted?”)</text:p>
        </text:list-item>
        <text:list-item>
          <text:p text:style-name="P163">confidence (“this isn’t hallucinated”)</text:p>
        </text:list-item>
      </text:list>
      <text:p text:style-name="Horizontal_20_Line"/>
      <text:h text:style-name="Heading_20_1" text:outline-level="1">Should you still store line numbers?</text:h>
      <text:p text:style-name="Text_20_body">Optional—but useful if easy.</text:p>
      <text:p text:style-name="Text_20_body">If you can capture them cheaply during ingestion:</text:p>
      <text:p text:style-name="Preformatted_20_Text"><text:span text:style-name="Source_20_Text">line_start = 142</text:span></text:p>
      <text:p text:style-name="P1"><text:span text:style-name="Source_20_Text">line_end = 148</text:span></text:p>
      <text:p text:style-name="Text_20_body">Great.</text:p>
      <text:p text:style-name="Text_20_body">But don’t depend on them as your primary reference.</text:p>
      <text:p text:style-name="Horizontal_20_Line"/>
      <text:h text:style-name="Heading_20_1" text:outline-level="1"><text:soft-page-break/>Best practice for your setup (simple + robust)</text:h>
      <text:p text:style-name="Text_20_body">I’d store:</text:p>
      <text:h text:style-name="Heading_20_2" text:outline-level="2">In <text:span text:style-name="Source_20_Text">documents</text:span></text:h>
      <text:p text:style-name="Preformatted_20_Text"><text:span text:style-name="Source_20_Text">id</text:span></text:p>
      <text:p text:style-name="Preformatted_20_Text"><text:span text:style-name="Source_20_Text">file_path</text:span></text:p>
      <text:p text:style-name="P1"><text:span text:style-name="Source_20_Text">source_text <text:s text:c="2"/>-- full text</text:span></text:p>
      <text:h text:style-name="Heading_20_2" text:outline-level="2">In <text:span text:style-name="Source_20_Text">chunks</text:span></text:h>
      <text:p text:style-name="Preformatted_20_Text"><text:span text:style-name="Source_20_Text">id</text:span></text:p>
      <text:p text:style-name="Preformatted_20_Text"><text:span text:style-name="Source_20_Text">document_id</text:span></text:p>
      <text:p text:style-name="Preformatted_20_Text"><text:span text:style-name="Source_20_Text">text</text:span></text:p>
      <text:p text:style-name="Preformatted_20_Text"><text:span text:style-name="Source_20_Text">char_start</text:span></text:p>
      <text:p text:style-name="P1"><text:span text:style-name="Source_20_Text">char_end</text:span></text:p>
      <text:h text:style-name="Heading_20_2" text:outline-level="2">In <text:span text:style-name="Source_20_Text">claims</text:span></text:h>
      <text:p text:style-name="Preformatted_20_Text"><text:span text:style-name="Source_20_Text">id</text:span></text:p>
      <text:p text:style-name="Preformatted_20_Text"><text:span text:style-name="Source_20_Text">chunk_id</text:span></text:p>
      <text:p text:style-name="Preformatted_20_Text"><text:span text:style-name="Source_20_Text">statement</text:span></text:p>
      <text:p text:style-name="Preformatted_20_Text"><text:span text:style-name="Source_20_Text">source_span</text:span></text:p>
      <text:p text:style-name="P1"><text:span text:style-name="Source_20_Text">confidence</text:span></text:p>
      <text:p text:style-name="Text_20_body">That gives you:</text:p>
      <text:list text:style-name="L159">
        <text:list-item>
          <text:p text:style-name="P164"><text:span text:style-name="Strong_20_Emphasis">file-level traceability</text:span> (document)</text:p>
        </text:list-item>
        <text:list-item>
          <text:p text:style-name="P164"><text:span text:style-name="Strong_20_Emphasis">structural traceability</text:span> (chunk)</text:p>
        </text:list-item>
        <text:list-item>
          <text:p text:style-name="P164"><text:span text:style-name="Strong_20_Emphasis">human-readable evidence</text:span> (span)</text:p>
        </text:list-item>
      </text:list>
      <text:p text:style-name="Horizontal_20_Line"/>
      <text:h text:style-name="Heading_20_1" text:outline-level="1">How this plays out in practice</text:h>
      <text:p text:style-name="Text_20_body">When something goes wrong (and it will), you can do:</text:p>
      <text:p text:style-name="Quotations">“Why did the system say this?”</text:p>
      <text:p text:style-name="Text_20_body">Then:</text:p>
      <text:list text:style-name="L160">
        <text:list-item>
          <text:p text:style-name="P165">look at claim</text:p>
        </text:list-item>
        <text:list-item>
          <text:p text:style-name="P165">read <text:span text:style-name="Source_20_Text">source_span</text:span></text:p>
        </text:list-item>
        <text:list-item>
          <text:p text:style-name="P165">jump to chunk</text:p>
        </text:list-item>
        <text:list-item>
          <text:p text:style-name="P165">open original document</text:p>
        </text:list-item>
      </text:list>
      <text:p text:style-name="Text_20_body">No guesswork. No “AI vibes.”</text:p>
      <text:p text:style-name="Horizontal_20_Line"/>
      <text:h text:style-name="Heading_20_1" text:outline-level="1"><text:soft-page-break/>One subtle but important rule</text:h>
      <text:p text:style-name="Text_20_body">Keep spans <text:span text:style-name="Strong_20_Emphasis">short</text:span>.</text:p>
      <text:p text:style-name="Text_20_body">Bad:</text:p>
      <text:list text:style-name="L161">
        <text:list-item>
          <text:p text:style-name="P166">whole paragraph</text:p>
        </text:list-item>
      </text:list>
      <text:p text:style-name="Text_20_body">Good:</text:p>
      <text:list text:style-name="L162">
        <text:list-item>
          <text:p text:style-name="P167">1–2 sentences max</text:p>
        </text:list-item>
      </text:list>
      <text:p text:style-name="Text_20_body">Reason:</text:p>
      <text:list text:style-name="L163">
        <text:list-item>
          <text:p text:style-name="P168">precision</text:p>
        </text:list-item>
        <text:list-item>
          <text:p text:style-name="P168">easier review</text:p>
        </text:list-item>
        <text:list-item>
          <text:p text:style-name="P168">less noise in prompts later</text:p>
        </text:list-item>
      </text:list>
      <text:p text:style-name="Horizontal_20_Line"/>
      <text:h text:style-name="Heading_20_1" text:outline-level="1">How this helps later (this is where it pays off)</text:h>
      <text:p text:style-name="Text_20_body">Once you have spans, you can:</text:p>
      <text:h text:style-name="Heading_20_3" text:outline-level="3">1) Build grounded answers</text:h>
      <text:p text:style-name="Text_20_body">Return:</text:p>
      <text:p text:style-name="Quotations">“According to [source], …”</text:p>
      <text:list text:style-name="L164">
        <text:list-item>
          <text:p text:style-name="P2">show snippet</text:p>
        </text:list-item>
      </text:list>
      <text:h text:style-name="Heading_20_3" text:outline-level="3">2) Detect contradictions</text:h>
      <text:p text:style-name="Text_20_body">Compare claims with overlapping entities but different spans</text:p>
      <text:h text:style-name="Heading_20_3" text:outline-level="3">3) Improve prompts</text:h>
      <text:p text:style-name="Text_20_body">Feed spans directly into RAG context</text:p>
      <text:h text:style-name="Heading_20_3" text:outline-level="3">4) Audit extraction quality</text:h>
      <text:p text:style-name="Text_20_body">You can literally inspect whether claims match text</text:p>
      <text:p text:style-name="Horizontal_20_Line"/>
      <text:h text:style-name="Heading_20_1" text:outline-level="1">Quick sanity check rule</text:h>
      <text:p text:style-name="Text_20_body">Every claim must pass:</text:p>
      <text:p text:style-name="Quotations">“If I deleted the rest of the system, could I still verify this claim from this span alone?”</text:p>
      <text:p text:style-name="Text_20_body"><text:soft-page-break/>If yes → good<text:line-break/>If no → too vague or invented</text:p>
      <text:p text:style-name="Horizontal_20_Line"/>
      <text:h text:style-name="Heading_20_1" text:outline-level="1">Bottom line</text:h>
      <text:p text:style-name="Text_20_body">You’ve got the right instinct:</text:p>
      <text:list text:style-name="L165">
        <text:list-item>
          <text:p text:style-name="P169">yes → tie back to original lore text</text:p>
        </text:list-item>
        <text:list-item>
          <text:p text:style-name="P169">but don’t rely on line numbers alone</text:p>
        </text:list-item>
        <text:list-item>
          <text:p text:style-name="P169">always include <text:span text:style-name="Strong_20_Emphasis">verbatim source spans</text:span></text:p>
        </text:list-item>
      </text:list>
      <text:p text:style-name="Text_20_body">That’s what turns this from:</text:p>
      <text:p text:style-name="Quotations">“AI toy”</text:p>
      <text:p text:style-name="Text_20_body">into:</text:p>
      <text:p text:style-name="Quotations">“trustworthy working tool”</text:p>
      <text:p text:style-name="Horizontal_20_Line"/>
      <text:p text:style-name="Text_20_body">If you want next step, we can define your <text:span text:style-name="Strong_20_Emphasis">first extraction prompt</text:span> so it reliably produces:</text:p>
      <text:list text:style-name="L166">
        <text:list-item>
          <text:p text:style-name="P170">clean claims</text:p>
        </text:list-item>
        <text:list-item>
          <text:p text:style-name="P170">tight spans</text:p>
        </text:list-item>
        <text:list-item>
          <text:p text:style-name="P170">zero hallucinated filler</text:p>
        </text:list-item>
      </text:list>
      <text:p text:style-name="Text_20_body">---</text:p>
      <text:p text:style-name="Text_20_body">ah! i see, we are extracting text right into the database. a `chunk` literally exists as a DB item, yes? </text:p>
      <text:p text:style-name="Text_20_body">---</text:p>
      <text:p text:style-name="Text_20_body">Yes—exactly. A <text:span text:style-name="Strong_20_Emphasis">chunk is a first-class record in your database</text:span>, not just a transient thing in memory.</text:p>
      <text:p text:style-name="Text_20_body">That’s a key design decision, and you’re making the right one.</text:p>
      <text:p text:style-name="Horizontal_20_Line"/>
      <text:h text:style-name="Heading_20_1" text:outline-level="1">What a “chunk” really is (in your system)</text:h>
      <text:p text:style-name="Text_20_body">Think of it this way:</text:p>
      <text:p text:style-name="Quotations">A chunk = a stable, addressable slice of your lore corpus</text:p>
      <text:p text:style-name="Text_20_body">It’s not just:</text:p>
      <text:list text:style-name="L167">
        <text:list-item>
          <text:p text:style-name="P171">“some text we split temporarily”</text:p>
        </text:list-item>
      </text:list>
      <text:p text:style-name="Text_20_body">It <text:span text:style-name="Strong_20_Emphasis">is</text:span>:</text:p>
      <text:list text:style-name="L168">
        <text:list-item>
          <text:p text:style-name="P172"><text:soft-page-break/>something you can reference</text:p>
        </text:list-item>
        <text:list-item>
          <text:p text:style-name="P172">something you can retrieve</text:p>
        </text:list-item>
        <text:list-item>
          <text:p text:style-name="P172">something you can debug against</text:p>
        </text:list-item>
        <text:list-item>
          <text:p text:style-name="P172">something claims point to</text:p>
        </text:list-item>
      </text:list>
      <text:p text:style-name="Horizontal_20_Line"/>
      <text:h text:style-name="Heading_20_1" text:outline-level="1">Why chunks belong in the DB (not just in code)</text:h>
      <text:p text:style-name="Text_20_body">If you <text:span text:style-name="Emphasis">don’t</text:span> persist chunks, you run into problems quickly:</text:p>
      <text:list text:style-name="L169">
        <text:list-item>
          <text:p text:style-name="P173">extraction becomes non-reproducible</text:p>
        </text:list-item>
        <text:list-item>
          <text:p text:style-name="P173">retrieval results are hard to debug</text:p>
        </text:list-item>
        <text:list-item>
          <text:p text:style-name="P173">claims lose context</text:p>
        </text:list-item>
        <text:list-item>
          <text:p text:style-name="P173">chunking changes break everything silently</text:p>
        </text:list-item>
      </text:list>
      <text:p text:style-name="Text_20_body">By storing them, you get:</text:p>
      <text:list text:style-name="L170">
        <text:list-item>
          <text:p text:style-name="P174">stability</text:p>
        </text:list-item>
        <text:list-item>
          <text:p text:style-name="P174">traceability</text:p>
        </text:list-item>
        <text:list-item>
          <text:p text:style-name="P174">repeatability</text:p>
        </text:list-item>
      </text:list>
      <text:p text:style-name="Horizontal_20_Line"/>
      <text:h text:style-name="Heading_20_1" text:outline-level="1">Mental model (this is the important part)</text:h>
      <text:p text:style-name="Text_20_body">Hierarchy:</text:p>
      <text:p text:style-name="Preformatted_20_Text"><text:span text:style-name="Source_20_Text">Document</text:span></text:p>
      <text:p text:style-name="Preformatted_20_Text"><text:span text:style-name="Source_20_Text"><text:s text:c="2"/>→ Chunk</text:span></text:p>
      <text:p text:style-name="P1"><text:span text:style-name="Source_20_Text"><text:s text:c="6"/>→ Claim</text:span></text:p>
      <text:p text:style-name="Text_20_body">And:</text:p>
      <text:p text:style-name="P1"><text:span text:style-name="Source_20_Text">Claim → references → Chunk → references → Document</text:span></text:p>
      <text:p text:style-name="Text_20_body">So when you inspect a claim, you can walk all the way back to source.</text:p>
      <text:p text:style-name="Horizontal_20_Line"/>
      <text:h text:style-name="Heading_20_1" text:outline-level="1">What a chunk row should minimally contain</text:h>
      <text:p text:style-name="Text_20_body">You don’t need much:</text:p>
      <text:p text:style-name="Preformatted_20_Text"><text:span text:style-name="Source_20_Text">chunks</text:span></text:p>
      <text:p text:style-name="Preformatted_20_Text"><text:span text:style-name="Source_20_Text">------</text:span></text:p>
      <text:p text:style-name="Preformatted_20_Text"><text:span text:style-name="Source_20_Text">id</text:span></text:p>
      <text:p text:style-name="Preformatted_20_Text"><text:soft-page-break/><text:span text:style-name="Source_20_Text">document_id</text:span></text:p>
      <text:p text:style-name="Preformatted_20_Text"><text:span text:style-name="Source_20_Text">chunk_index</text:span></text:p>
      <text:p text:style-name="Preformatted_20_Text"><text:span text:style-name="Source_20_Text">text</text:span></text:p>
      <text:p text:style-name="Preformatted_20_Text"><text:span text:style-name="Source_20_Text">char_start <text:s text:c="2"/>-- optional but useful</text:span></text:p>
      <text:p text:style-name="P1"><text:span text:style-name="Source_20_Text">char_end <text:s text:c="4"/>-- optional</text:span></text:p>
      <text:p text:style-name="Text_20_body">That’s enough.</text:p>
      <text:p text:style-name="Text_20_body">Optional later:</text:p>
      <text:list text:style-name="L171">
        <text:list-item>
          <text:p text:style-name="P175">embedding vector</text:p>
        </text:list-item>
        <text:list-item>
          <text:p text:style-name="P175">hash (for dedup / change detection)</text:p>
        </text:list-item>
      </text:list>
      <text:p text:style-name="Horizontal_20_Line"/>
      <text:h text:style-name="Heading_20_1" text:outline-level="1">Example (concrete)</text:h>
      <text:h text:style-name="Heading_20_3" text:outline-level="3">Document</text:h>
      <text:p text:style-name="P1"><text:span text:style-name="Source_20_Text">doc_12: "covenant_origins.md"</text:span></text:p>
      <text:h text:style-name="Heading_20_3" text:outline-level="3">Chunk</text:h>
      <text:p text:style-name="Preformatted_20_Text"><text:span text:style-name="Source_20_Text">chunk_9001:</text:span></text:p>
      <text:p text:style-name="P1"><text:span text:style-name="Source_20_Text">"In the waning years of the Ashen Era, the Covenant of Varkaar first took form among the northern provinces..."</text:span></text:p>
      <text:h text:style-name="Heading_20_3" text:outline-level="3">Claim</text:h>
      <text:p text:style-name="P1"><text:span text:style-name="Source_20_Text">"The Covenant of Varkaar emerged during the Ashen Era"</text:span></text:p>
      <text:p text:style-name="Text_20_body">With:</text:p>
      <text:list text:style-name="L172">
        <text:list-item>
          <text:p text:style-name="P176"><text:span text:style-name="Source_20_Text">chunk_id = 9001</text:span></text:p>
        </text:list-item>
        <text:list-item>
          <text:p text:style-name="P176"><text:span text:style-name="Source_20_Text">source_span = "...waning years of the Ashen Era..."</text:span></text:p>
        </text:list-item>
      </text:list>
      <text:p text:style-name="Horizontal_20_Line"/>
      <text:h text:style-name="Heading_20_1" text:outline-level="1">Why this design is powerful (and boring—in a good way)</text:h>
      <text:p text:style-name="Text_20_body">This lets you:</text:p>
      <text:h text:style-name="Heading_20_3" text:outline-level="3">1) Re-run extraction later</text:h>
      <text:p text:style-name="Text_20_body">If you improve prompts, you can:</text:p>
      <text:list text:style-name="L173">
        <text:list-item>
          <text:p text:style-name="P177">reuse the same chunks</text:p>
        </text:list-item>
        <text:list-item>
          <text:p text:style-name="P177">regenerate claims</text:p>
        </text:list-item>
        <text:list-item>
          <text:p text:style-name="P177">compare results</text:p>
        </text:list-item>
      </text:list>
      <text:h text:style-name="Heading_20_3" text:outline-level="3"><text:soft-page-break/>2) Debug retrieval</text:h>
      <text:p text:style-name="Text_20_body">If the system gives a bad answer:</text:p>
      <text:list text:style-name="L174">
        <text:list-item>
          <text:p text:style-name="P178">inspect retrieved chunks</text:p>
        </text:list-item>
        <text:list-item>
          <text:p text:style-name="P178">not just “model output”</text:p>
        </text:list-item>
      </text:list>
      <text:h text:style-name="Heading_20_3" text:outline-level="3">3) Add embeddings later without redesign</text:h>
      <text:p text:style-name="Text_20_body">You just add a column or side table:</text:p>
      <text:p text:style-name="P1"><text:span text:style-name="Source_20_Text">chunk_embeddings</text:span></text:p>
      <text:p text:style-name="Text_20_body">No schema rewrite needed.</text:p>
      <text:h text:style-name="Heading_20_3" text:outline-level="3">4) Keep your pipeline deterministic</text:h>
      <text:p text:style-name="Text_20_body">Chunking becomes a <text:span text:style-name="Strong_20_Emphasis">controlled transformation</text:span>, not a side effect.</text:p>
      <text:p text:style-name="Horizontal_20_Line"/>
      <text:h text:style-name="Heading_20_1" text:outline-level="1">One important design rule (don’t skip this)</text:h>
      <text:p text:style-name="Text_20_body">👉 <text:span text:style-name="Strong_20_Emphasis">Chunking must be deterministic</text:span></text:p>
      <text:p text:style-name="Text_20_body">Given the same document:</text:p>
      <text:list text:style-name="L175">
        <text:list-item>
          <text:p text:style-name="P179">you should get the same chunks every time</text:p>
        </text:list-item>
      </text:list>
      <text:p text:style-name="Text_20_body">Otherwise:</text:p>
      <text:list text:style-name="L176">
        <text:list-item>
          <text:p text:style-name="P180">claim references break</text:p>
        </text:list-item>
        <text:list-item>
          <text:p text:style-name="P180">evaluation becomes meaningless</text:p>
        </text:list-item>
      </text:list>
      <text:p text:style-name="Text_20_body">So:</text:p>
      <text:list text:style-name="L177">
        <text:list-item>
          <text:p text:style-name="P181">fix chunk size logic</text:p>
        </text:list-item>
        <text:list-item>
          <text:p text:style-name="P181">don’t tweak it casually once you start loading data</text:p>
        </text:list-item>
      </text:list>
      <text:p text:style-name="Horizontal_20_Line"/>
      <text:h text:style-name="Heading_20_1" text:outline-level="1">Practical chunking advice (keep it simple)</text:h>
      <text:p text:style-name="Text_20_body">Start with:</text:p>
      <text:list text:style-name="L178">
        <text:list-item>
          <text:p text:style-name="P182">~500–800 words per chunk</text:p>
        </text:list-item>
        <text:list-item>
          <text:p text:style-name="P182">no overlap (yet)</text:p>
        </text:list-item>
        <text:list-item>
          <text:p text:style-name="P182">split on paragraph boundaries if possible</text:p>
        </text:list-item>
      </text:list>
      <text:p text:style-name="Text_20_body">Don’t over-engineer this now.</text:p>
      <text:p text:style-name="Horizontal_20_Line"/>
      <text:h text:style-name="Heading_20_1" text:outline-level="1"><text:soft-page-break/>One subtle improvement you may want early</text:h>
      <text:p text:style-name="Text_20_body">Store a <text:span text:style-name="Strong_20_Emphasis">document version or hash</text:span>.</text:p>
      <text:p text:style-name="Preformatted_20_Text"><text:span text:style-name="Source_20_Text">documents</text:span></text:p>
      <text:p text:style-name="Preformatted_20_Text"><text:span text:style-name="Source_20_Text">---------</text:span></text:p>
      <text:p text:style-name="Preformatted_20_Text"><text:span text:style-name="Source_20_Text">id</text:span></text:p>
      <text:p text:style-name="Preformatted_20_Text"><text:span text:style-name="Source_20_Text">file_path</text:span></text:p>
      <text:p text:style-name="P1"><text:span text:style-name="Source_20_Text">content_hash</text:span></text:p>
      <text:p text:style-name="Text_20_body">Why:</text:p>
      <text:list text:style-name="L179">
        <text:list-item>
          <text:p text:style-name="P183">if you edit source text later, you can detect drift</text:p>
        </text:list-item>
        <text:list-item>
          <text:p text:style-name="P183">you avoid silent mismatch between claims and source</text:p>
        </text:list-item>
      </text:list>
      <text:p text:style-name="Horizontal_20_Line"/>
      <text:h text:style-name="Heading_20_1" text:outline-level="1">Bottom line</text:h>
      <text:p text:style-name="Text_20_body">Yes:</text:p>
      <text:p text:style-name="Quotations">a chunk is a persistent DB object</text:p>
      <text:p text:style-name="Text_20_body">And that decision gives you:</text:p>
      <text:list text:style-name="L180">
        <text:list-item>
          <text:p text:style-name="P184">traceability</text:p>
        </text:list-item>
        <text:list-item>
          <text:p text:style-name="P184">reproducibility</text:p>
        </text:list-item>
        <text:list-item>
          <text:p text:style-name="P184">debuggability</text:p>
        </text:list-item>
        <text:list-item>
          <text:p text:style-name="P184">extensibility</text:p>
        </text:list-item>
      </text:list>
      <text:p text:style-name="Text_20_body">It’s one of the most important “quietly correct” choices in your design so far.</text:p>
      <text:p text:style-name="Horizontal_20_Line"/>
      <text:p text:style-name="Text_20_body">If you want next step, we can lock down:</text:p>
      <text:p text:style-name="Text_20_body">👉 a <text:span text:style-name="Strong_20_Emphasis">deterministic chunking rule</text:span> you won’t regret later<text:line-break/>(or)<text:line-break/>👉 your <text:span text:style-name="Strong_20_Emphasis">first extraction prompt tied to chunks + claims</text:span></text:p>
      <text:p text:style-name="Text_20_body"/>
      <text:p text:style-name="Text_20_body">----</text:p>
      <text:p text:style-name="Text_20_body"/>
      <text:p text:style-name="Text_20_body">and as a note-to-self and reminder-to-my-AI-assistant, I want to resist the urge to expand upon or elaborate on the lore. I have already gone thru a lengthy process of `putting a pin` in the lore. <text:s/>The point of this project is not to `perfect` the lore, only to make it usable in an interesting kind of tool. </text:p>
      <text:p text:style-name="Text_20_body"/>
      <text:p text:style-name="Text_20_body">---</text:p>
      <text:p text:style-name="Text_20_body"><text:soft-page-break/></text:p>
      <text:p text:style-name="Text_20_body">Good—this is the most important constraint you’ve stated so far. If you hold this line, the project stays healthy. If you break it, it turns into a second writing project and eats the first one.</text:p>
      <text:p text:style-name="Text_20_body">I’d actually formalize this as a <text:span text:style-name="Strong_20_Emphasis">hard guardrail</text:span>, not just a note-to-self.</text:p>
      <text:p text:style-name="Horizontal_20_Line"/>
      <text:h text:style-name="Heading_20_1" text:outline-level="1">Make this an explicit ADR</text:h>
      <text:h text:style-name="Heading_20_3" text:outline-level="3">ADR-007: No Lore Expansion During Extraction</text:h>
      <text:p text:style-name="Text_20_body"><text:span text:style-name="Strong_20_Emphasis">Decision:</text:span><text:line-break/>The system shall not introduce new lore, fill gaps, or “improve” existing material during extraction or processing.</text:p>
      <text:p text:style-name="Text_20_body"><text:span text:style-name="Strong_20_Emphasis">Rules:</text:span></text:p>
      <text:list text:style-name="L181">
        <text:list-item>
          <text:p text:style-name="P185">Only extract what is explicitly stated or strongly implied</text:p>
        </text:list-item>
        <text:list-item>
          <text:p text:style-name="P185">No inference that adds new canon</text:p>
        </text:list-item>
        <text:list-item>
          <text:p text:style-name="P185">No “completing” missing details</text:p>
        </text:list-item>
        <text:list-item>
          <text:p text:style-name="P185">No stylistic rewriting of source text</text:p>
        </text:list-item>
      </text:list>
      <text:p text:style-name="Text_20_body"><text:span text:style-name="Strong_20_Emphasis">Why:</text:span><text:line-break/>Preserves the integrity of the existing corpus and prevents scope creep into creative rewriting.</text:p>
      <text:p text:style-name="Text_20_body"><text:span text:style-name="Strong_20_Emphasis">Implication:</text:span><text:line-break/>All enrichment must be structural (metadata, relationships), not narrative.</text:p>
      <text:p text:style-name="Horizontal_20_Line"/>
      <text:h text:style-name="Heading_20_1" text:outline-level="1">Turn this into an operational rule (this matters more than the ADR)</text:h>
      <text:p text:style-name="Text_20_body">Every extraction prompt should include something like:</text:p>
      <text:p text:style-name="Preformatted_20_Text"><text:span text:style-name="Source_20_Text">Only extract information explicitly stated or strongly implied.</text:span></text:p>
      <text:p text:style-name="Preformatted_20_Text"><text:span text:style-name="Source_20_Text">Do NOT invent, extend, or improve the lore.</text:span></text:p>
      <text:p text:style-name="P1"><text:span text:style-name="Source_20_Text">If information is missing or unclear, leave it empty or mark as unknown.</text:span></text:p>
      <text:p text:style-name="Text_20_body">And you should enforce this during review.</text:p>
      <text:p text:style-name="Horizontal_20_Line"/>
      <text:h text:style-name="Heading_20_1" text:outline-level="1">Practical “tripwire” during review</text:h>
      <text:p text:style-name="Text_20_body">When looking at extracted claims, ask:</text:p>
      <text:p text:style-name="Quotations">“Did this exist in the text, or did the model <text:span text:style-name="Emphasis">helpfully improve it</text:span>?”</text:p>
      <text:p text:style-name="Text_20_body"><text:soft-page-break/>If the answer is even slightly:</text:p>
      <text:list text:style-name="L182">
        <text:list-item>
          <text:p text:style-name="P186">“well… kind of…”<text:line-break/>→ reject or rewrite.</text:p>
        </text:list-item>
      </text:list>
      <text:p text:style-name="Horizontal_20_Line"/>
      <text:h text:style-name="Heading_20_1" text:outline-level="1">Examples (this is where people slip)</text:h>
      <text:h text:style-name="Heading_20_3" text:outline-level="3">Source text:</text:h>
      <text:p text:style-name="Quotations">“Some accounts suggest the Covenant arose in the north during a time of famine.”</text:p>
      <text:h text:style-name="Heading_20_3" text:outline-level="3">Good claim:</text:h>
      <text:list text:style-name="L183">
        <text:list-item>
          <text:p text:style-name="P187">“Some accounts place the Covenant’s origin in the north during a time of famine”</text:p>
        </text:list-item>
      </text:list>
      <text:h text:style-name="Heading_20_3" text:outline-level="3">Bad (subtle hallucination):</text:h>
      <text:list text:style-name="L184">
        <text:list-item>
          <text:p text:style-name="P188">“The Covenant of Varkaar was founded in the northern provinces during the Great Famine”</text:p>
        </text:list-item>
      </text:list>
      <text:p text:style-name="Text_20_body">Why bad:</text:p>
      <text:list text:style-name="L185">
        <text:list-item>
          <text:p text:style-name="P189">“Great Famine” was invented</text:p>
        </text:list-item>
        <text:list-item>
          <text:p text:style-name="P189">uncertainty removed</text:p>
        </text:list-item>
        <text:list-item>
          <text:p text:style-name="P189">tone shifted from rumor → fact</text:p>
        </text:list-item>
      </text:list>
      <text:p text:style-name="Text_20_body">That’s exactly the drift you want to prevent.</text:p>
      <text:p text:style-name="Horizontal_20_Line"/>
      <text:h text:style-name="Heading_20_1" text:outline-level="1">Another common failure mode</text:h>
      <text:h text:style-name="Heading_20_3" text:outline-level="3">Source:</text:h>
      <text:p text:style-name="Quotations">“Scholars disagree on whether the Covenant was primarily religious.”</text:p>
      <text:h text:style-name="Heading_20_3" text:outline-level="3">Bad extraction:</text:h>
      <text:list text:style-name="L186">
        <text:list-item>
          <text:p text:style-name="P190">“The Covenant was a religious institution”</text:p>
        </text:list-item>
      </text:list>
      <text:h text:style-name="Heading_20_3" text:outline-level="3">Good extraction:</text:h>
      <text:list text:style-name="L187">
        <text:list-item>
          <text:p text:style-name="P191">“Scholars disagree on whether the Covenant was primarily religious”</text:p>
        </text:list-item>
      </text:list>
      <text:p text:style-name="Text_20_body">You preserve ambiguity. That’s gold for your world.</text:p>
      <text:p text:style-name="Horizontal_20_Line"/>
      <text:h text:style-name="Heading_20_1" text:outline-level="1"><text:soft-page-break/>What you <text:span text:style-name="Emphasis">are</text:span> allowed to improve</text:h>
      <text:p text:style-name="Text_20_body">This is important—you’re not freezing everything.</text:p>
      <text:p text:style-name="Text_20_body">You can improve:</text:p>
      <text:h text:style-name="Heading_20_3" text:outline-level="3">Structure</text:h>
      <text:list text:style-name="L188">
        <text:list-item>
          <text:p text:style-name="P192">chunking</text:p>
        </text:list-item>
        <text:list-item>
          <text:p text:style-name="P192">metadata</text:p>
        </text:list-item>
        <text:list-item>
          <text:p text:style-name="P192">relationships</text:p>
        </text:list-item>
        <text:list-item>
          <text:p text:style-name="P192">indexing</text:p>
        </text:list-item>
      </text:list>
      <text:h text:style-name="Heading_20_3" text:outline-level="3">Clarity of claims (without changing meaning)</text:h>
      <text:list text:style-name="L189">
        <text:list-item>
          <text:p text:style-name="P193">tightening wording</text:p>
        </text:list-item>
        <text:list-item>
          <text:p text:style-name="P193">removing fluff</text:p>
        </text:list-item>
        <text:list-item>
          <text:p text:style-name="P193">making statements testable</text:p>
        </text:list-item>
      </text:list>
      <text:h text:style-name="Heading_20_3" text:outline-level="3">Consistency</text:h>
      <text:list text:style-name="L190">
        <text:list-item>
          <text:p text:style-name="P194">entity naming (via canonical IDs)</text:p>
        </text:list-item>
        <text:list-item>
          <text:p text:style-name="P194">tagging</text:p>
        </text:list-item>
      </text:list>
      <text:p text:style-name="Horizontal_20_Line"/>
      <text:h text:style-name="Heading_20_1" text:outline-level="1">What you are NOT allowed to improve</text:h>
      <text:list text:style-name="L191">
        <text:list-item>
          <text:p text:style-name="P195">lore gaps</text:p>
        </text:list-item>
        <text:list-item>
          <text:p text:style-name="P195">motivations</text:p>
        </text:list-item>
        <text:list-item>
          <text:p text:style-name="P195">timelines</text:p>
        </text:list-item>
        <text:list-item>
          <text:p text:style-name="P195">causal explanations</text:p>
        </text:list-item>
        <text:list-item>
          <text:p text:style-name="P195">missing links</text:p>
        </text:list-item>
      </text:list>
      <text:p text:style-name="Text_20_body">Those belong in your writing, not this system.</text:p>
      <text:p text:style-name="Horizontal_20_Line"/>
      <text:h text:style-name="Heading_20_1" text:outline-level="1">Why this matters more than it sounds</text:h>
      <text:p text:style-name="Text_20_body">If you hold this boundary:</text:p>
      <text:p text:style-name="Text_20_body">Your system becomes:</text:p>
      <text:list text:style-name="L192">
        <text:list-item>
          <text:p text:style-name="P196">a <text:span text:style-name="Strong_20_Emphasis">lens on your world</text:span></text:p>
        </text:list-item>
      </text:list>
      <text:p text:style-name="Text_20_body">If you break it:</text:p>
      <text:p text:style-name="Text_20_body"><text:soft-page-break/>It becomes:</text:p>
      <text:list text:style-name="L193">
        <text:list-item>
          <text:p text:style-name="P197">a <text:span text:style-name="Strong_20_Emphasis">co-author you didn’t ask for</text:span></text:p>
        </text:list-item>
      </text:list>
      <text:p text:style-name="Text_20_body">And worse:</text:p>
      <text:list text:style-name="L194">
        <text:list-item>
          <text:p text:style-name="P198">you won’t know which is which</text:p>
        </text:list-item>
      </text:list>
      <text:p text:style-name="Horizontal_20_Line"/>
      <text:h text:style-name="Heading_20_1" text:outline-level="1">One small addition I’d recommend</text:h>
      <text:p text:style-name="Text_20_body">Add a field to claims:</text:p>
      <text:p text:style-name="P1"><text:span text:style-name="Source_20_Text">extraction_confidence</text:span></text:p>
      <text:p text:style-name="Text_20_body">Not because it’s “accurate,” but because:</text:p>
      <text:list text:style-name="L195">
        <text:list-item>
          <text:p text:style-name="P199">it forces the model to admit uncertainty</text:p>
        </text:list-item>
        <text:list-item>
          <text:p text:style-name="P199">it signals where you should pay attention during review</text:p>
        </text:list-item>
      </text:list>
      <text:p text:style-name="Horizontal_20_Line"/>
      <text:h text:style-name="Heading_20_1" text:outline-level="1">Even better (optional, later)</text:h>
      <text:p text:style-name="Text_20_body">Add a boolean:</text:p>
      <text:p text:style-name="P1"><text:span text:style-name="Source_20_Text">needs_review = true</text:span></text:p>
      <text:p text:style-name="Text_20_body">And only flip it to false when you’ve looked at it.</text:p>
      <text:p text:style-name="Text_20_body">Simple, effective.</text:p>
      <text:p text:style-name="Horizontal_20_Line"/>
      <text:h text:style-name="Heading_20_1" text:outline-level="1">A useful mindset (this fits your approach well)</text:h>
      <text:p text:style-name="Text_20_body">Think of the system as:</text:p>
      <text:p text:style-name="Quotations">an archivist, not a storyteller</text:p>
      <text:list text:style-name="L196">
        <text:list-item>
          <text:p text:style-name="P200">It records</text:p>
        </text:list-item>
        <text:list-item>
          <text:p text:style-name="P200">It indexes</text:p>
        </text:list-item>
        <text:list-item>
          <text:p text:style-name="P200">It cross-references</text:p>
        </text:list-item>
        <text:list-item>
          <text:p text:style-name="P200">It does not embellish</text:p>
        </text:list-item>
      </text:list>
      <text:p text:style-name="Horizontal_20_Line"/>
      <text:h text:style-name="Heading_20_1" text:outline-level="1">Bottom line</text:h>
      <text:p text:style-name="Text_20_body">This constraint you just stated is not a side note—it’s a <text:span text:style-name="Strong_20_Emphasis">design principle</text:span>:</text:p>
      <text:list text:style-name="L197">
        <text:list-item>
          <text:p text:style-name="P201"><text:soft-page-break/>extraction = preservation</text:p>
        </text:list-item>
        <text:list-item>
          <text:p text:style-name="P201">structure = augmentation</text:p>
        </text:list-item>
        <text:list-item>
          <text:p text:style-name="P201">creativity = outside the system</text:p>
        </text:list-item>
      </text:list>
      <text:p text:style-name="Text_20_body">Hold that line, and everything else you’re building will stay clean and trustworthy.</text:p>
      <text:p text:style-name="Horizontal_20_Line"/>
      <text:p text:style-name="Text_20_body">When you’re ready, next step I’d suggest:</text:p>
      <text:p text:style-name="Text_20_body">👉 Draft your <text:span text:style-name="Strong_20_Emphasis">first extraction prompt + review checklist</text:span> that enforces this discipline automatically.</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9T18:08:13.089369639</meta:creation-date>
    <dc:date>2026-03-29T18:59:44.572429062</dc:date>
    <meta:editing-duration>PT51M31S</meta:editing-duration>
    <meta:editing-cycles>3</meta:editing-cycles>
    <meta:generator>LibreOffice/24.2.7.2$Linux_X86_64 LibreOffice_project/420$Build-2</meta:generator>
    <meta:print-date>2026-03-29T18:17:42.075478778</meta:print-date>
    <meta:printed-by>PDF files</meta:printed-by>
    <meta:document-statistic meta:table-count="1" meta:image-count="0" meta:object-count="0" meta:page-count="65" meta:paragraph-count="1718" meta:word-count="10659" meta:character-count="62643" meta:non-whitespace-character-count="53961"/>
  </office:meta>
</office:document-meta>
</file>